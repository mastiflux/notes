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06E64594E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F17" svg:font-family="F17"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Aufgabe" style:list-style-name="WWNum29"/>
    <style:style style:name="P2" style:family="paragraph" style:parent-style-name="Lösung">
      <style:text-properties fo:font-size="12pt" fo:font-weight="normal" style:font-size-asian="12pt" style:font-weight-asian="normal" style:font-size-complex="12pt"/>
    </style:style>
    <style:style style:name="P3" style:family="paragraph" style:parent-style-name="Lösung">
      <style:text-properties officeooo:rsid="000465c2" officeooo:paragraph-rsid="000465c2"/>
    </style:style>
    <style:style style:name="P4" style:family="paragraph" style:parent-style-name="Lösung">
      <style:text-properties officeooo:rsid="00055876" officeooo:paragraph-rsid="00055876"/>
    </style:style>
    <style:style style:name="P5" style:family="paragraph" style:parent-style-name="Lösung">
      <style:text-properties fo:font-size="12pt" fo:font-weight="normal" officeooo:paragraph-rsid="00055876" style:font-size-asian="12pt" style:font-weight-asian="normal" style:font-size-complex="12pt"/>
    </style:style>
    <style:style style:name="P6" style:family="paragraph" style:parent-style-name="Aufgabe" style:list-style-name="WWNum29">
      <style:text-properties officeooo:paragraph-rsid="00055876"/>
    </style:style>
    <style:style style:name="P7" style:family="paragraph" style:parent-style-name="Lösung">
      <style:text-properties officeooo:paragraph-rsid="00055876"/>
    </style:style>
    <style:style style:name="P8" style:family="paragraph" style:parent-style-name="Lösung">
      <style:text-properties fo:color="#000000" loext:opacity="100%" style:font-name="Cambria" officeooo:rsid="0006fb99" officeooo:paragraph-rsid="0006fb99" fo:background-color="#ffffff"/>
    </style:style>
    <style:style style:name="P9" style:family="paragraph" style:parent-style-name="Lösung">
      <style:text-properties officeooo:rsid="0006fb99" officeooo:paragraph-rsid="0006fb99"/>
    </style:style>
    <style:style style:name="P10" style:family="paragraph" style:parent-style-name="Lösung">
      <style:text-properties officeooo:paragraph-rsid="0006fb99"/>
    </style:style>
    <style:style style:name="P11" style:family="paragraph" style:parent-style-name="Lösung">
      <style:text-properties officeooo:rsid="0008bd98" officeooo:paragraph-rsid="0008bd98"/>
    </style:style>
    <style:style style:name="T1" style:family="text">
      <style:text-properties fo:color="#345a8a" loext:opacity="100%" fo:font-family="Calibri" style:font-family-generic="swiss" style:font-pitch="variable" style:font-family-asian="Calibri" style:font-family-generic-asian="system" style:font-pitch-asian="variable" style:font-family-complex="Calibri" style:font-family-generic-complex="system" style:font-pitch-complex="variable"/>
    </style:style>
    <style:style style:name="T2" style:family="text">
      <style:text-properties fo:font-weight="bold" style:font-weight-asian="bold" style:font-weight-complex="bold"/>
    </style:style>
    <style:style style:name="T3" style:family="text">
      <style:text-properties fo:font-size="12pt" fo:font-weight="normal" style:font-size-asian="12pt" style:font-weight-asian="normal" style:font-size-complex="12pt"/>
    </style:style>
    <style:style style:name="T4" style:family="text">
      <style:text-properties fo:font-family="Consolas" style:font-family-generic="roman" style:font-pitch="variable" fo:font-size="12pt" fo:font-weight="normal" style:font-size-asian="12pt" style:font-weight-asian="normal" style:font-family-complex="Consolas" style:font-family-generic-complex="system" style:font-pitch-complex="variable" style:font-size-complex="12pt"/>
    </style:style>
    <style:style style:name="T5" style:family="text">
      <style:text-properties fo:font-size="12pt" fo:font-weight="normal" officeooo:rsid="000465c2" style:font-size-asian="12pt" style:font-weight-asian="normal" style:font-size-complex="12pt"/>
    </style:style>
    <style:style style:name="T6" style:family="text">
      <style:text-properties officeooo:rsid="000465c2"/>
    </style:style>
    <style:style style:name="T7" style:family="text">
      <style:text-properties fo:font-family="Consolas" style:font-family-generic="roman" style:font-pitch="variable" style:font-family-complex="Consolas" style:font-family-generic-complex="system" style:font-pitch-complex="variable"/>
    </style:style>
    <style:style style:name="T8" style:family="text">
      <style:text-properties fo:font-size="12pt" fo:font-weight="normal" officeooo:rsid="00055876" style:font-size-asian="12pt" style:font-weight-asian="normal" style:font-size-complex="12pt"/>
    </style:style>
    <style:style style:name="T9" style:family="text">
      <style:text-properties fo:color="#000000" loext:opacity="100%" fo:font-family="monospace" fo:font-size="12pt" fo:font-weight="normal" fo:background-color="#ffffff" loext:char-shading-value="0" style:font-size-asian="12pt" style:font-weight-asian="normal" style:font-size-complex="12pt"/>
    </style:style>
    <style:style style:name="T10" style:family="text">
      <style:text-properties officeooo:rsid="00055876"/>
    </style:style>
    <style:style style:name="T11" style:family="text">
      <style:text-properties fo:color="#000000" loext:opacity="100%" fo:font-family="monospace" fo:background-color="#ffffff" loext:char-shading-value="0"/>
    </style:style>
    <style:style style:name="T12" style:family="text">
      <style:text-properties officeooo:rsid="0006fb99"/>
    </style:style>
    <style:style style:name="T13" style:family="text">
      <style:text-properties officeooo:rsid="0008bd98"/>
    </style:style>
    <style:style style:name="T14" style:family="text">
      <style:text-properties fo:font-size="12pt" fo:font-weight="normal" officeooo:rsid="0008bd98" style:font-size-asian="12pt" style:font-weight-asian="normal" style:font-size-complex="12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loext:marker-style-name="T1"><text:span text:style-name="T1">Praktikum 05: Ein- und Ausgabedatenströme, Nutzer und Zugriffsrechte</text:span><text:span text:style-name="T1"/></text:h>
      <text:p text:style-name="Standard" loext:marker-style-name="T2">Jeweils 1 Punkt für die Lösung pro Aufgabe, wenn Sie uns davon überzeugen, die Lösung verstanden zu haben. Bitte nutzen Sie nur die aus der Vorlesung bekannten Kommandos. Für einige Aufgaben müssen Sie mit dem/der Gruppenpartner/in auf dem gleichen Rechner zu arbeiten, z.B. dem Raspberry Pi. <text:span text:style-name="T2">Bitte notieren Sie die Kommandos und ggf. auch die Ausgabe!</text:span><text:span text:style-name="T2"/></text:p>
      <text:list text:style-name="WWNum29">
        <text:list-item>
          <text:p text:style-name="P1">Erzeugen <text:span text:style-name="Formatvorlage1"><text:span text:style-name="T3">Sie eine Datei mit der Auflistung der Dateien aus </text:span></text:span><text:span text:style-name="Formatvorlage1"><text:span text:style-name="T4">/etc</text:span></text:span><text:span text:style-name="Formatvorlage1"><text:span text:style-name="T3">. Kontrollieren Sie, ob die Datei den gewünschten Inhalt hat.</text:span></text:span></text:p>
        </text:list-item>
      </text:list>
      <text:p text:style-name="P2" loext:marker-style-name="T3"><text:span text:style-name="Formatvorlage1"><text:span text:style-name="T3">ls /etc &gt; etc_liste.txt </text:span></text:span><text:span text:style-name="Formatvorlage1"><text:span text:style-name="T5">#Erzeugung</text:span></text:span></text:p>
      <text:p text:style-name="P2" loext:marker-style-name="T3"><text:span text:style-name="Formatvorlage1"><text:span text:style-name="T3">cat etc_liste.txt </text:span></text:span><text:span text:style-name="Formatvorlage1"><text:span text:style-name="T5">#Kontrolle</text:span></text:span></text:p>
      <text:list text:continue-numbering="true" text:style-name="WWNum29">
        <text:list-item>
          <text:p text:style-name="P1"><text:span text:style-name="Formatvorlage1"><text:span text:style-name="T3">Untersuchen Sie die Datei </text:span></text:span><text:span text:style-name="Formatvorlage1"><text:span text:style-name="T4">/etc/passwd</text:span></text:span><text:span text:style-name="Formatvorlage1"><text:span text:style-name="T3">. Was bedeuten die einzelnen Felder (Tipp: man 5 passwd)?</text:span></text:span></text:p>
        </text:list-item>
      </text:list>
      <text:p text:style-name="Lösung">man 5 passwd</text:p>
      <text:p text:style-name="Lösung">cat /etc/passw<text:span text:style-name="T6">d</text:span></text:p>
      <text:list text:continue-numbering="true" text:style-name="WWNum29">
        <text:list-item>
          <text:p text:style-name="P1">Wie viele Zeichen und wie viele Zeilen enthält die Datei <text:span text:style-name="T7">/etc/passwd</text:span>?</text:p>
        </text:list-item>
      </text:list>
      <text:p text:style-name="P3">wc -cl /etc/passwd #c für Zeichen, l für Zeilen</text:p>
      <text:p text:style-name="Lösung"/>
      <text:list text:continue-numbering="true" text:style-name="WWNum29">
        <text:list-item>
          <text:p text:style-name="P1">Geben Sie die ersten drei und die letzten drei Zeilen der Datei aus!</text:p>
        </text:list-item>
      </text:list>
      <text:p text:style-name="P3">head -3 /etc/passwd</text:p>
      <text:p text:style-name="P3">tail -3 /etc/passwd</text:p>
      <text:list text:continue-numbering="true" text:style-name="WWNum29">
        <text:list-item>
          <text:p text:style-name="P1"><text:span text:style-name="Formatvorlage1"><text:span text:style-name="T3">Lassen Sie sich aus der Datei </text:span></text:span><text:span text:style-name="Formatvorlage1"><text:span text:style-name="T4">/etc/passwd</text:span></text:span><text:span text:style-name="Formatvorlage1"><text:span text:style-name="T3"> die Home-Verzeichnisse aller Benutzer ausgeben, die nicht die </text:span></text:span><text:span text:style-name="Formatvorlage1"><text:span text:style-name="T4">bash</text:span></text:span><text:span text:style-name="Formatvorlage1"><text:span text:style-name="T3"> als Shell nutzen. Doppelte Verzeichnisse sollen nur einmal angezeigt werden.</text:span></text:span></text:p>
        </text:list-item>
      </text:list>
      <text:p text:style-name="Lösung">grep -v "/bin/bash" /etc/passwd | cut -d: -f6 | sort -u</text:p>
      <text:p text:style-name="P3">#filtert alle Zeilen ohne bash raus | spaltet bei : und nimmt Feld 6 | sortiert und entfernt Duplikate</text:p>
      <text:list text:continue-numbering="true" text:style-name="WWNum29">
        <text:list-item>
          <text:p text:style-name="P1"><text:span text:style-name="Formatvorlage1"><text:span text:style-name="T3">Lassen Sie sich die Zeilennummer (und nur die Zeilennummer!) ausgeben, in der der Benutzer </text:span></text:span><text:span text:style-name="Formatvorlage1"><text:span text:style-name="T4">nobody</text:span></text:span><text:span text:style-name="Formatvorlage1"><text:span text:style-name="T3"> (nur dieser Benutzer!) in der Datei </text:span></text:span><text:span text:style-name="Formatvorlage1"><text:span text:style-name="T4">/etc/passwd</text:span></text:span><text:span text:style-name="Formatvorlage1"><text:span text:style-name="T3"> eingetragen ist.</text:span></text:span></text:p>
        </text:list-item>
      </text:list>
      <text:p text:style-name="Lösung">grep -n "^nobody:" /etc/passwd | cut -d: -f1</text:p>
      <text:p text:style-name="P4">#gibt die Zeilennummer mit aus, filtert nach nobody: | extrahiert die Zeilennummer</text:p>
      <text:list text:continue-numbering="true" text:style-name="WWNum29">
        <text:list-item>
          <text:p text:style-name="P1" loext:marker-style-name="T3"><text:span text:style-name="Formatvorlage1"><text:span text:style-name="T3">Welche User ID hat ihr Unix-Benutzer, welche Group ID? </text:span></text:span><text:span text:style-name="T3"/></text:p>
        </text:list-item>
      </text:list>
      <text:p text:style-name="P5" loext:marker-style-name="T3"><text:soft-page-break/><text:span text:style-name="Formatvorlage1"><text:span text:style-name="T8">id</text:span></text:span></text:p>
      <text:p text:style-name="P2" loext:marker-style-name="T3"><text:span text:style-name="Formatvorlage1"><text:span text:style-name="T9">uid=1000(fhaese) gid=1000(fhaese) groups=1000(fhaese),10(wheel)</text:span></text:span></text:p>
      <text:list text:continue-numbering="true" text:style-name="WWNum29">
        <text:list-item>
          <text:p text:style-name="P6" loext:marker-style-name="T3">Was darf eine Benutzerin, wenn sie für ein Verzeichnis Ausführungsrechte (<text:span text:style-name="code"><text:span text:style-name="T7">x</text:span></text:span>), aber keine Leserechte (<text:span text:style-name="code"><text:span text:style-name="T7">r</text:span></text:span>) besitzt? Was im umgekehrten Fall?</text:p>
        </text:list-item>
      </text:list>
      <text:p text:style-name="P7"><text:span text:style-name="T10">--x: cd </text:span>ins Verzeichnis möglich, Dateizugriff wenn Name <text:span text:style-name="T10">bekannt</text:span> – aber <text:span text:style-name="T10">kein ls</text:span></text:p>
      <text:p text:style-name="P4">r--: ls möglich aber kein cd und kein Dateizugriff</text:p>
      <text:list text:continue-numbering="true" text:style-name="WWNum29">
        <text:list-item>
          <text:p text:style-name="P1"><text:span text:style-name="Formatvorlage1"><text:span text:style-name="T3">Lassen Sie sich alle User (nur die User!) ausgeben, die aktuell angemeldet sind. Benutzer, die mehrfach angemeldet sind, sollen nur einmal ausgegeben werden.</text:span></text:span></text:p>
        </text:list-item>
      </text:list>
      <text:p text:style-name="Lösung">who | awk '{print $1}' | sort -u</text:p>
      <text:p text:style-name="P4">#listet alle angemeldeten Nutzer auf | trahiert nur erste Spalte (Nutzername) | entfernt Duplikate und sortiert</text:p>
      <text:p text:style-name="P7"><text:span text:style-name="T10">Ausgabe: </text:span><text:span text:style-name="T11">fhaese</text:span></text:p>
      <text:list text:continue-numbering="true" text:style-name="WWNum29">
        <text:list-item>
          <text:p text:style-name="P1" loext:marker-style-name="T3"><text:span text:style-name="Formatvorlage1"><text:span text:style-name="T3">Lassen Sie sich Ihre </text:span></text:span><text:span text:style-name="Formatvorlage1"><text:span text:style-name="T4">umask</text:span></text:span><text:span text:style-name="Formatvorlage1"><text:span text:style-name="T3"> anzeigen. Welche Zugriffsrechte auf Dateien und Verzeichnisse, die Sie damit erzeugen, haben andere Benutzer? Vollziehen Sie Ihre Antwort anhand des Vorlesungsmaterials zu Dateizugriffsrechten und </text:span></text:span><text:span text:style-name="Formatvorlage1"><text:span text:style-name="T4">umask</text:span></text:span><text:span text:style-name="Formatvorlage1"><text:span text:style-name="T3"> nach.</text:span></text:span></text:p>
        </text:list-item>
      </text:list>
      <text:p text:style-name="P4">umask</text:p>
      <text:p text:style-name="P7"><text:span text:style-name="T10">Ausgabe: </text:span><text:span text:style-name="T11">0022 </text:span></text:p>
      <text:p text:style-name="P8">-&gt; wird bei Erzeugung von Dateien und Verzeichnissen abgezogen, damit nur der Besitzer volle Rechte hat, bei Dateien also von oktal 666 und bei Verzeichnissen von oktal 0777</text:p>
      <text:list text:continue-numbering="true" text:style-name="WWNum29">
        <text:list-item>
          <text:p text:style-name="P1" loext:marker-style-name="T3"><text:span text:style-name="Formatvorlage1"><text:span text:style-name="T3">Welche Rechte werden benötigt, damit die Gruppe in einem Verzeichnis Dateien anlegen darf? Wie lautet der entsprechende </text:span></text:span><text:span text:style-name="Formatvorlage1"><text:span text:style-name="T4">umask</text:span></text:span><text:span text:style-name="Formatvorlage1"><text:span text:style-name="T3"> Befehl?</text:span></text:span></text:p>
        </text:list-item>
      </text:list>
      <text:p text:style-name="P9">umask 002</text:p>
      <text:p text:style-name="P9">-&gt; erfordert w und x für die Gruppe</text:p>
      <text:list text:continue-numbering="true" text:style-name="WWNum29">
        <text:list-item>
          <text:p text:style-name="P1" loext:marker-style-name="T3"><text:span text:style-name="Formatvorlage1"><text:span text:style-name="T3">Erstellen Sie ein Verzeichnis und setzen Sie die Dateizugriffsrechte so, dass jeder in diesem Verzeichnis Dateien und Verzeichnisse erstellen kann, aber Dateien und Verzeichnisse nur von den jeweiligen Eigentümern gelöscht werden können. Überprüfen Sie mit Mitstudenten die Zugriffsrechte des Verzeichnisses.</text:span></text:span><text:span text:style-name="T3"/></text:p>
        </text:list-item>
      </text:list>
      <text:p text:style-name="Lösung">mkdir shared</text:p>
      <text:p text:style-name="Lösung">chmod 1777 shared</text:p>
      <text:p text:style-name="Lösung">ls -la</text:p>
      <text:p text:style-name="P9">#t am Ende (sticky bit), damit alle Dateien erzeugen dürfen aber nur der Besitzer löschen darf</text:p>
      <text:list text:continue-numbering="true" text:style-name="WWNum29">
        <text:list-item>
          <text:p text:style-name="P1"><text:span text:style-name="Formatvorlage1"><text:span text:style-name="T3">Setzen Sie die Zugriffsrechte einer Datei </text:span></text:span><text:span text:style-name="Formatvorlage1"><text:span text:style-name="T4">datei</text:span></text:span><text:span text:style-name="Formatvorlage1"><text:span text:style-name="T3"> so, dass der Besitzer lesen und schreiben, die Gruppe lesen und alle anderen keine Zugriffsrechte haben. Geben Sie </text:span></text:span><text:soft-page-break/><text:span text:style-name="Formatvorlage1"><text:span text:style-name="T3">den Zugriffsmodus des Befehls einmal symbolisch mit Buchstaben und einmal in Oktalschreibweise an.</text:span></text:span></text:p>
        </text:list-item>
      </text:list>
      <text:p text:style-name="Lösung">chmod u=rw,g=r,o= datei #symbolisch</text:p>
      <text:p text:style-name="Lösung">chmod 640 datei #oktal</text:p>
      <text:list text:continue-numbering="true" text:style-name="WWNum29">
        <text:list-item>
          <text:p text:style-name="P1"><text:span text:style-name="Formatvorlage1"><text:span text:style-name="T3">Entziehen Sie der Gruppe das Leserecht.</text:span></text:span></text:p>
        </text:list-item>
      </text:list>
      <text:p text:style-name="Lösung">chmod g-r datei #symbolisch</text:p>
      <text:p text:style-name="Lösung">chmod 600 datei #oktal</text:p>
      <text:list text:continue-numbering="true" text:style-name="WWNum29">
        <text:list-item>
          <text:p text:style-name="P1">Lassen Sie sich alle Dateien auflisten, die sowohl in <text:span text:style-name="T7">/bin</text:span> als auch in <text:span text:style-name="T7">/usr/bin</text:span> vorhanden sind (Tipp: Der Befehl <text:span text:style-name="T7">uniq</text:span> bietet mehr Funktionen als der Name vermuten lässt – Lesen Sie die Manual Page).</text:p>
        </text:list-item>
      </text:list>
      <text:p text:style-name="Lösung">ls /bin /usr/bin | sort | uniq -d</text:p>
      <text:p text:style-name="P9">#listet beide Verzeichnisse untereinander auf | sortiert die Ergebnisse | gibt nur Zeilen aus, die in beiden vorhanden sind (nur Duplikate)</text:p>
      <text:list text:continue-numbering="true" text:style-name="WWNum29">
        <text:list-item>
          <text:p text:style-name="P1"><text:span text:style-name="Formatvorlage1"><text:span text:style-name="T3">Wie viele Prozesse laufen aktuell auf Ihrem System? Versuchen Sie herauszufinden, welche PID Ihre Shell hat.</text:span></text:span></text:p>
        </text:list-item>
      </text:list>
      <text:p text:style-name="P10"><text:span text:style-name="T12">ps aux | wc -l</text:span></text:p>
      <text:p text:style-name="P9">ps -l</text:p>
      <text:list text:continue-numbering="true" text:style-name="WWNum29">
        <text:list-item>
          <text:p text:style-name="P1"><text:span text:style-name="Formatvorlage1"><text:span text:style-name="T3">Erstellen Sie zu einer einzigen Datei jeweils mehrere Hard- und Softlinks. Verwenden Sie für die Softlinks auch unterschiedliche Pfade zu gleichen Datei. Was kann man in der Ausgabe von </text:span></text:span><text:span text:style-name="Formatvorlage1"><text:span text:style-name="T4">ls -l</text:span></text:span><text:span text:style-name="Formatvorlage1"><text:span text:style-name="T3"> über den Link erkennen?</text:span></text:span></text:p>
        </text:list-item>
      </text:list>
      <text:p text:style-name="Lösung">echo "<text:span text:style-name="T12">test</text:span>" &gt; original.txt <text:span text:style-name="T12">#Datei erstellen</text:span></text:p>
      <text:p text:style-name="Lösung">ln original.txt hardlink1.txt <text:span text:style-name="T12">#Hardlink 1</text:span></text:p>
      <text:p text:style-name="Lösung">ln original.txt hardlink2.txt <text:span text:style-name="T12">#Hardlink 2</text:span></text:p>
      <text:p text:style-name="Lösung">ln -s original.txt softlink1.txt <text:span text:style-name="T12">#Softlink 1</text:span></text:p>
      <text:p text:style-name="Lösung">ln -s /home/user/original.txt softlink2.txt <text:span text:style-name="T12">#Softlink 2</text:span></text:p>
      <text:p text:style-name="Lösung"/>
      <text:p text:style-name="Lösung">-&gt; <text:span text:style-name="T13">bei Hardlinks geht Link-Zähler hoch, der Inode ist identisch und die Dateigröße entspricht der der Originaldatei</text:span></text:p>
      <text:p text:style-name="Lösung">-&gt; <text:span text:style-name="T13">bei Softlinks bleibt der Link-Zähler bei 1, die Inodes sind Eigene, die Dateigröße ist die Länge des Pfades</text:span></text:p>
      <text:list text:continue-numbering="true" text:style-name="WWNum29">
        <text:list-item>
          <text:p text:style-name="P1"><text:span text:style-name="Formatvorlage1"><text:span text:style-name="T3">Starten Sie </text:span></text:span><text:span text:style-name="Formatvorlage1"><text:span text:style-name="T4">sleep 120</text:span></text:span><text:span text:style-name="Formatvorlage1"><text:span text:style-name="T3"> im Vordergund. Halten den Prozess an, ohne Ihn zu beenden (Tastenkombination?). Überprüfen Sie den Zustand (1) der Jobs in diesem Terminal (</text:span></text:span><text:span text:style-name="Formatvorlage1"><text:span text:style-name="T4">jobs</text:span></text:span><text:span text:style-name="Formatvorlage1"><text:span text:style-name="T3">) und (2) Ihrer Prozesse (</text:span></text:span><text:span text:style-name="Formatvorlage1"><text:span text:style-name="T4">ps</text:span></text:span><text:span text:style-name="Formatvorlage1"><text:span text:style-name="T3"> mit der Option </text:span></text:span><text:span text:style-name="Formatvorlage1"><text:span text:style-name="T4">-l</text:span></text:span><text:span text:style-name="Formatvorlage1"><text:span text:style-name="T3">, Spalte S, Details erst in der nächsten Woche). Lassen Sie den Befehl im Hintergrund weiterlaufen. Was verändert sich?</text:span></text:span></text:p>
        </text:list-item>
      </text:list>
      <text:p text:style-name="Lösung"><text:soft-page-break/>sleep 120</text:p>
      <text:p text:style-name="Lösung">#Strg+Z drücken <text:s/>-&gt; <text:span text:style-name="T13">pausiert den Prozess</text:span></text:p>
      <text:p text:style-name="Lösung">jobs <text:span text:style-name="T13">#zeigt, dass der Prozess gestoppt wurde</text:span></text:p>
      <text:p text:style-name="Lösung">bg <text:span text:style-name="T13">#job läuft jetzt im Hintergrund</text:span></text:p>
      <text:p text:style-name="Lösung">jobs <text:span text:style-name="T13">#zeigt jetzt, dass der Prozess läuft</text:span></text:p>
      <text:list text:continue-numbering="true" text:style-name="WWNum29">
        <text:list-item>
          <text:p text:style-name="P1"><text:span text:style-name="Formatvorlage1"><text:span text:style-name="T3">Öffnen Sie zwei Terminalfenster. Starten Sie in Terminal 1 </text:span></text:span><text:span text:style-name="Formatvorlage1"><text:span text:style-name="T4">sleep 300</text:span></text:span><text:span text:style-name="Formatvorlage1"><text:span text:style-name="T3"> im Vordergund. Senden Sie dem Prozess die Signale </text:span></text:span><text:span text:style-name="Formatvorlage1"><text:span text:style-name="T4">SIGSTOP</text:span></text:span><text:span text:style-name="Formatvorlage1"><text:span text:style-name="T3">, </text:span></text:span><text:span text:style-name="Formatvorlage1"><text:span text:style-name="T4">SIGCONT</text:span></text:span><text:span text:style-name="Formatvorlage1"><text:span text:style-name="T3">, </text:span></text:span><text:span text:style-name="Formatvorlage1"><text:span text:style-name="T4">SIGTERM</text:span></text:span><text:span text:style-name="Formatvorlage1"><text:span text:style-name="T3"> und </text:span></text:span><text:span text:style-name="Formatvorlage1"><text:span text:style-name="T4">SIGKILL</text:span></text:span><text:span text:style-name="Formatvorlage1"><text:span text:style-name="T3">. Beobachten Sie den Prozess mit ps -l. Was passiert beim Senden der Signale?</text:span></text:span></text:p>
        </text:list-item>
      </text:list>
      <text:p text:style-name="P11">Terminal 1:</text:p>
      <text:p text:style-name="P11">sleep 300</text:p>
      <text:p text:style-name="P11">Terminal 2:</text:p>
      <text:p text:style-name="P11">ps -l #PID von sleep 300 herausfinden (z.B. 1234)</text:p>
      <text:p text:style-name="P11">kill -SIGSTOP 1234 <text:s/>#Prozess einfrieren -&gt; Status T</text:p>
      <text:p text:style-name="P11">kill -SIGCONT 1234 <text:s/>#Prozess weiterlaufen lassen -&gt; Status S</text:p>
      <text:p text:style-name="P11">kill -SIGTERM 1234 <text:s/>#“Höfliche“ Beendigung (Prozess kann abfangen)</text:p>
      <text:p text:style-name="P11">kill -SIGKILL 1234 <text:s/>#Sofortiges Beenden (nicht abfangbar)</text:p>
      <text:list text:continue-numbering="true" text:style-name="WWNum29">
        <text:list-item>
          <text:p text:style-name="P1"><text:span text:style-name="Formatvorlage1"><text:span text:style-name="T3">Öffnen Sie zwei Terminalfenster. Können Sie Signale an den Prozess Ihres Partners/Ihrer Partnerin send</text:span></text:span><text:span text:style-name="Formatvorlage1"><text:span text:style-name="T14">e</text:span></text:span><text:span text:style-name="Formatvorlage1"><text:span text:style-name="T3">n? Ist das sinnvoll?</text:span></text:span></text:p>
        </text:list-item>
      </text:list>
      <text:p text:style-name="Lösung">kill -SIGTERM &lt;PID_des_Partners&gt;</text:p>
      <text:p text:style-name="Lösung">-&gt; <text:span text:style-name="T13">keine Berechtigung dazu</text:span></text:p>
      <text:p text:style-name="Lösung">-&gt; <text:span text:style-name="T13">nicht sinnvoll, da sonst einfach jeder normale Benutzer die Prozesse anderer Benutzer manipulieren könnte, das darf nur root</text:span></text:p>
      <text:p text:style-name="Standard"/>
      <text:p text:style-name="Standard">Zur Bearbeitung des Übungszettels haben wir ca. __<text:span text:style-name="T13">60</text:span>__ Minuten pro Person benötig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F17" svg:font-family="F17"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1" fo:font-size="12pt" fo:language="de" fo:country="DE" style:letter-kerning="false" style:font-name-asian="Arial1" style:font-size-asian="12pt" style:language-asian="de" style:country-asian="DE" style:font-name-complex="Arial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Cambria1" fo:font-size="12pt" fo:language="de" fo:country="DE" style:letter-kerning="false" style:font-name-asian="Arial1" style:font-size-asian="12pt" style:language-asian="de" style:country-asian="DE"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line-height="110%" fo:text-align="justify" style:justify-single-word="false" fo:orphans="2" fo:widows="2" fo:hyphenation-ladder-count="no-limit" fo:hyphenation-keep="page" loext:hyphenation-keep-type="column" loext:hyphenation-keep-line="false" style:writing-mode="lr-tb" loext:word-spacing-minimum="75%" loext:word-spacing-maximum="133%"/>
      <style:text-properties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line-height="115%"/>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chapter">
      <style:paragraph-properties fo:margin-top="0.3335in" fo:margin-bottom="0in" style:contextual-spacing="false" fo:keep-together="always" fo:keep-with-next="always"/>
      <style:text-properties fo:color="#345a8a" loext:opacity="100%" style:font-name="Calibri" fo:font-family="Calibri"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chapter">
      <style:paragraph-properties fo:margin-top="0.028in" fo:margin-bottom="0in" style:contextual-spacing="false" fo:keep-together="always" fo:keep-with-next="always"/>
      <style:text-properties fo:color="#365f91" loext:opacity="100%" style:font-name="Calibri" fo:font-family="Calibri" style:font-family-generic="roman" style:font-pitch="variable" fo:font-size="13pt"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Überschrift_20_3_20_Zchn" style:default-outline-level="3" style:list-style-name="" style:class="chapter">
      <style:paragraph-properties fo:margin-top="0.222in" fo:margin-bottom="0.139in" style:contextual-spacing="false" fo:keep-together="always" fo:keep-with-next="always"/>
      <style:text-properties style:font-name="Arial" fo:font-family="Arial" style:font-family-generic="swiss"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next-style-name="Standard" loext:linked-style-name="Überschrift_20_4_20_Zchn" style:default-outline-level="4" style:list-style-name="" style:class="chapter">
      <style:paragraph-properties fo:margin-top="0.222in" fo:margin-bottom="0.139in" style:contextual-spacing="false" fo:keep-together="always" fo:keep-with-next="always"/>
      <style:text-properties style:font-name="Arial" fo:font-family="Arial" style:font-family-generic="swiss"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0.222in" fo:margin-bottom="0.139in" style:contextual-spacing="false" fo:keep-together="always" fo:keep-with-next="always"/>
      <style:text-properties style:font-name="Arial" fo:font-family="Arial" style:font-family-generic="swiss"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Heading_20_6" style:display-name="Heading 6" style:family="paragraph" style:parent-style-name="Standard" style:next-style-name="Standard" loext:linked-style-name="Überschrift_20_6_20_Zchn" style:default-outline-level="6" style:list-style-name="" style:class="chapter">
      <style:paragraph-properties fo:margin-top="0.222in" fo:margin-bottom="0.139in" style:contextual-spacing="false" fo:keep-together="always" fo:keep-with-next="always"/>
      <style:text-properties style:font-name="Arial" fo:font-family="Arial" style:font-family-generic="swiss"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next-style-name="Standard" loext:linked-style-name="Überschrift_20_7_20_Zchn" style:default-outline-level="7" style:list-style-name="" style:class="chapter">
      <style:paragraph-properties fo:margin-top="0.222in" fo:margin-bottom="0.139in" style:contextual-spacing="false" fo:keep-together="always" fo:keep-with-next="always"/>
      <style:text-properties style:font-name="Arial" fo:font-family="Arial" style:font-family-generic="swiss"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next-style-name="Standard" loext:linked-style-name="Überschrift_20_8_20_Zchn" style:default-outline-level="8" style:list-style-name="" style:class="chapter">
      <style:paragraph-properties fo:margin-top="0.222in" fo:margin-bottom="0.139in" style:contextual-spacing="false" fo:keep-together="always" fo:keep-with-next="always"/>
      <style:text-properties style:font-name="Arial" fo:font-family="Arial" style:font-family-generic="swiss"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next-style-name="Standard" loext:linked-style-name="Überschrift_20_9_20_Zchn" style:default-outline-level="9" style:list-style-name="" style:class="chapter">
      <style:paragraph-properties fo:margin-top="0.222in" fo:margin-bottom="0.139in" style:contextual-spacing="false" fo:keep-together="always" fo:keep-with-next="always"/>
      <style:text-properties style:font-name="Arial" fo:font-family="Arial" style:font-family-generic="swiss"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 style:family="paragraph" style:parent-style-name="Standard" style:next-style-name="Standard" loext:linked-style-name="Titel_20_Zchn"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next-style-name="Standard" loext:linked-style-name="Untertitel_20_Zchn" style:class="chapter">
      <style:paragraph-properties fo:margin-top="0.139in" fo:margin-bottom="0.139in" style:contextual-spacing="false"/>
    </style:style>
    <style:style style:name="Quote" style:family="paragraph" style:parent-style-name="Standard" style:next-style-name="Standard" loext:linked-style-name="Zitat_20_Zchn">
      <style:paragraph-properties fo:margin-left="0.5in" fo:margin-right="0.5in"/>
      <style:text-properties fo:font-style="italic" style:font-style-asian="italic"/>
    </style:style>
    <style:style style:name="Intense_20_Quote" style:display-name="Intense Quote" style:family="paragraph" style:parent-style-name="Standard" style:next-style-name="Standard" loext:linked-style-name="Intensives_20_Zitat_20_Zchn">
      <loext:graphic-properties draw:fill="solid" draw:fill-color="#f2f2f2"/>
      <style:paragraph-properties fo:margin-left="0.5in" fo:margin-right="0.5in"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loext:linked-style-name="Fußnotentext_20_Zchn" style:class="extra">
      <style:paragraph-properties fo:margin-top="0.0835in" fo:margin-bottom="0.028in" style:contextual-spacing="false" fo:line-height="100%"/>
      <style:text-properties fo:font-size="9pt" style:font-size-asian="9pt"/>
    </style:style>
    <style:style style:name="Endnote" style:family="paragraph" style:parent-style-name="Standard" loext:linked-style-name="Endnotentext_20_Zchn" style:class="extra">
      <style:paragraph-properties fo:line-height="100%"/>
      <style:text-properties fo:font-size="10pt" style:font-size-asian="10pt"/>
    </style:style>
    <style:style style:name="Contents_20_1" style:display-name="Contents 1" style:family="paragraph" style:parent-style-name="Standard" style:next-style-name="Standard" style:class="index">
      <style:paragraph-properties fo:margin-top="0.0835in" fo:margin-bottom="0.0398in" style:contextual-spacing="false"/>
    </style:style>
    <style:style style:name="Contents_20_2" style:display-name="Contents 2" style:family="paragraph" style:parent-style-name="Standard" style:next-style-name="Standard" style:class="index">
      <style:paragraph-properties fo:margin-left="0.1965in" fo:margin-top="0.0835in" fo:margin-bottom="0.0398in" style:contextual-spacing="false"/>
    </style:style>
    <style:style style:name="Contents_20_3" style:display-name="Contents 3" style:family="paragraph" style:parent-style-name="Standard" style:next-style-name="Standard" style:class="index">
      <style:paragraph-properties fo:margin-left="0.3937in" fo:margin-top="0.0835in" fo:margin-bottom="0.0398in" style:contextual-spacing="false"/>
    </style:style>
    <style:style style:name="Contents_20_4" style:display-name="Contents 4" style:family="paragraph" style:parent-style-name="Standard" style:next-style-name="Standard" style:class="index">
      <style:paragraph-properties fo:margin-left="0.5902in" fo:margin-top="0.0835in" fo:margin-bottom="0.0398in" style:contextual-spacing="false"/>
    </style:style>
    <style:style style:name="Contents_20_5" style:display-name="Contents 5" style:family="paragraph" style:parent-style-name="Standard" style:next-style-name="Standard" style:class="index">
      <style:paragraph-properties fo:margin-left="0.7874in" fo:margin-top="0.0835in" fo:margin-bottom="0.0398in" style:contextual-spacing="false"/>
    </style:style>
    <style:style style:name="Contents_20_6" style:display-name="Contents 6" style:family="paragraph" style:parent-style-name="Standard" style:next-style-name="Standard" style:class="index">
      <style:paragraph-properties fo:margin-left="0.9839in" fo:margin-top="0.0835in" fo:margin-bottom="0.0398in" style:contextual-spacing="false"/>
    </style:style>
    <style:style style:name="Contents_20_7" style:display-name="Contents 7" style:family="paragraph" style:parent-style-name="Standard" style:next-style-name="Standard" style:class="index">
      <style:paragraph-properties fo:margin-left="1.1811in" fo:margin-top="0.0835in" fo:margin-bottom="0.0398in" style:contextual-spacing="false"/>
    </style:style>
    <style:style style:name="Contents_20_8" style:display-name="Contents 8" style:family="paragraph" style:parent-style-name="Standard" style:next-style-name="Standard" style:class="index">
      <style:paragraph-properties fo:margin-left="1.378in" fo:margin-top="0.0835in" fo:margin-bottom="0.0398in" style:contextual-spacing="false"/>
    </style:style>
    <style:style style:name="Contents_20_9" style:display-name="Contents 9" style:family="paragraph" style:parent-style-name="Standard" style:next-style-name="Standard" style:class="index">
      <style:paragraph-properties fo:margin-left="1.5752in" fo:margin-top="0.0835in" fo:margin-bottom="0.0398in" style:contextual-spacing="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Figure_20_Index_20_1" style:display-name="Figure Index 1" style:family="paragraph" style:parent-style-name="Standard" style:next-style-name="Standard" style:class="index"/>
    <style:style style:name="Balloon_20_Text" style:display-name="Balloon Text" style:family="paragraph" style:parent-style-name="Standard" loext:linked-style-name="Sprechblasentext_20_Zchn">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paragraph-properties fo:margin-left="0.5in" fo:margin-top="0.0835in" fo:margin-bottom="0in"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Fußzeile_20_Zchn" style:class="extra">
      <style:paragraph-properties>
        <style:tab-stops>
          <style:tab-stop style:position="3.15in" style:type="center"/>
          <style:tab-stop style:position="6.3in" style:type="right"/>
        </style:tab-stops>
      </style:paragraph-properties>
    </style:style>
    <style:style style:name="Document_20_Map" style:display-name="Document Map" style:family="paragraph" style:parent-style-name="Standard" loext:linked-style-name="Dokumentstruktur_20_Zchn">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fo:font-size="11pt" style:font-size-asian="11pt" style:font-size-complex="11pt"/>
    </style:style>
    <style:style style:name="Aufgabe" style:family="paragraph" style:parent-style-name="Standard" style:next-style-name="Lösung" style:list-style-name="WWNum29"/>
    <style:style style:name="HTML_20_Preformatted" style:display-name="HTML Preformatted" style:family="paragraph" style:parent-style-name="Standard" loext:linked-style-name="HTML_20_Vorformatiert_20_Zchn">
      <style:paragraph-properties fo:margin-top="0in" fo:margin-bottom="0in" style:contextual-spacing="false" fo:line-height="100%" fo:text-align="start" style:justify-single-word="false" loext:word-spacing-minimum="75%" loext:word-spacing-maximum="133%">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ösung" style:family="paragraph" style:parent-style-name="Standard">
      <style:paragraph-properties fo:padding-left="0.0555in" fo:padding-right="0.0555in" fo:padding-top="0.0138in" fo:padding-bottom="0.0138in" fo:border="0.51pt solid #000000" style:shadow="none"/>
    </style:style>
    <style:style style:name="Revision" style:family="paragraph">
      <style:paragraph-properties fo:margin-top="0in" fo:margin-bottom="0in" style:contextual-spacing="false" fo:text-align="start" style:justify-single-word="false" fo:orphans="2" fo:widows="2" style:writing-mode="lr-tb"/>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swiss"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Überschrift_20_3_20_Zchn" style:display-name="Überschrift 3 Zchn" style:family="text" style:parent-style-name="Default_20_Paragraph_20_Font" loext:linked-style-name="Heading_20_3">
      <style:text-properties style:font-name="Arial" fo:font-family="Arial" style:font-family-generic="swiss"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Überschrift_20_4_20_Zchn" style:display-name="Überschrift 4 Zchn" style:family="text" style:parent-style-name="Default_20_Paragraph_20_Font" loext:linked-style-name="Heading_20_4">
      <style:text-properties style:font-name="Arial" fo:font-family="Arial" style:font-family-generic="swiss"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Überschrift_20_5_20_Zchn" style:display-name="Überschrift 5 Zchn" style:family="text" style:parent-style-name="Default_20_Paragraph_20_Font" loext:linked-style-name="Heading_20_5">
      <style:text-properties style:font-name="Arial" fo:font-family="Arial" style:font-family-generic="swiss"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Überschrift_20_6_20_Zchn" style:display-name="Überschrift 6 Zchn" style:family="text" style:parent-style-name="Default_20_Paragraph_20_Font" loext:linked-style-name="Heading_20_6">
      <style:text-properties style:font-name="Arial" fo:font-family="Arial" style:font-family-generic="swiss"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Überschrift_20_7_20_Zchn" style:display-name="Überschrift 7 Zchn" style:family="text" style:parent-style-name="Default_20_Paragraph_20_Font" loext:linked-style-name="Heading_20_7">
      <style:text-properties style:font-name="Arial" fo:font-family="Arial" style:font-family-generic="swiss"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Überschrift_20_8_20_Zchn" style:display-name="Überschrift 8 Zchn" style:family="text" style:parent-style-name="Default_20_Paragraph_20_Font" loext:linked-style-name="Heading_20_8">
      <style:text-properties style:font-name="Arial" fo:font-family="Arial" style:font-family-generic="swiss"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Überschrift_20_9_20_Zchn" style:display-name="Überschrift 9 Zchn" style:family="text" style:parent-style-name="Default_20_Paragraph_20_Font" loext:linked-style-name="Heading_20_9">
      <style:text-properties style:font-name="Arial" fo:font-family="Arial" style:font-family-generic="swiss"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el_20_Zchn" style:display-name="Titel Zchn" style:family="text" style:parent-style-name="Default_20_Paragraph_20_Font" loext:linked-style-name="Title">
      <style:text-properties fo:font-size="24pt" style:font-size-asian="24pt" style:font-size-complex="24pt"/>
    </style:style>
    <style:style style:name="Untertitel_20_Zchn" style:display-name="Untertitel Zchn" style:family="text" style:parent-style-name="Default_20_Paragraph_20_Font" loext:linked-style-name="Subtitle">
      <style:text-properties fo:font-size="12pt" style:font-size-asian="12pt" style:font-size-complex="12pt"/>
    </style:style>
    <style:style style:name="Zitat_20_Zchn" style:display-name="Zitat Zchn" style:family="text" loext:linked-style-name="Quote">
      <style:text-properties fo:font-style="italic" style:font-style-asian="italic"/>
    </style:style>
    <style:style style:name="Intensives_20_Zitat_20_Zchn" style:display-name="Intensives Zitat Zchn" style:family="text" loext:linked-style-name="Intense_20_Quote">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ußnotentext_20_Zchn" style:display-name="Fußnotentext Zchn" style:family="text" loext:linked-style-name="Footnote">
      <style:text-properties fo:font-size="9pt" style:font-size-asian="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ntext_20_Zchn" style:display-name="Endnotentext Zchn" style:family="text" loext:linked-style-name="Endnote">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Sprechblasentext_20_Zchn" style:display-name="Sprechblasentext Zchn"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Überschrift_20_1_20_Zchn" style:display-name="Überschrift 1 Zchn"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Dokumentstruktur_20_Zchn" style:display-name="Dokumentstruktur Zchn" style:family="text" style:parent-style-name="Default_20_Paragraph_20_Font" loext:linked-style-name="Document_20_Map">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Überschrift_20_2_20_Zchn" style:display-name="Überschrift 2 Zchn" style:family="text" style:parent-style-name="Default_20_Paragraph_20_Font" loext:linked-style-name="Heading_20_2">
      <style:text-properties fo:color="#365f91" loext:opacity="100%" style:font-name="Calibri" fo:font-family="Calibri" style:font-family-generic="roman" style:font-pitch="variable" fo:font-size="13pt"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loext:char-complex-color loext:theme-type="accent1" loext:color-type="theme">
          <loext:transformation loext:type="shade" loext:value="2509"/>
        </loext:char-complex-color>
      </style:text-properties>
    </style:style>
    <style:style style:name="pl-pds" style:family="text" style:parent-style-name="Default_20_Paragraph_20_Font"/>
    <style:style style:name="pl-smi" style:family="text" style:parent-style-name="Default_20_Paragraph_20_Font"/>
    <style:style style:name="code" style:family="text" style:parent-style-name="Default_20_Paragraph_20_Font">
      <style:text-properties style:font-name="Courier New" fo:font-family="'Courier New'" style:font-family-generic="roman" style:font-pitch="variable" fo:font-size="11pt" style:font-size-asian="11pt" style:font-name-complex="F17" style:font-family-complex="F17" style:font-family-generic-complex="system" style:font-pitch-complex="variable"/>
    </style:style>
    <style:style style:name="Formatvorlage1" style:family="text" style:parent-style-name="Default_20_Paragraph_20_Font">
      <style:text-properties style:font-name="Cambria1" fo:font-family="Cambria" style:font-family-generic="roman" style:font-pitch="variable" fo:font-size="11pt" fo:font-weight="bold" style:font-size-asian="11pt" style:font-weight-asian="bold" style:font-size-complex="16pt"/>
    </style:style>
    <style:style style:name="HTML_20_Vorformatiert_20_Zchn" style:display-name="HTML Vorformatiert Zchn" style:family="text" style:parent-style-name="Default_20_Paragraph_20_Font" loext:linked-style-name="HTML_20_Preformatted">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na" style:family="text" style:parent-style-name="Default_20_Paragraph_20_Font"/>
    <style:style style:name="pi" style:family="text" style:parent-style-name="Default_20_Paragraph_20_Font"/>
    <style:style style:name="s2" style:family="text" style:parent-style-name="Default_20_Paragraph_20_Font"/>
    <style:style style:name="s"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mbria2" fo:font-family="Cambria" style:font-family-generic="swiss" style:font-pitch="variable"/>
    </style:style>
    <style:style style:name="ListLabel_20_29" style:display-name="ListLabel 29" style:family="text">
      <style:text-properties style:font-name="Cambria2" fo:font-family="Cambria" style:font-family-generic="swiss" style:font-pitch="variable"/>
    </style:style>
    <style:style style:name="ListLabel_20_30" style:display-name="ListLabel 30" style:family="text">
      <style:text-properties style:font-name="Cambria2" fo:font-family="Cambria" style:font-family-generic="swiss" style:font-pitch="variable"/>
    </style:style>
    <style:style style:name="ListLabel_20_31" style:display-name="ListLabel 31" style:family="text">
      <style:text-properties style:font-name="Cambria2" fo:font-family="Cambria" style:font-family-generic="swiss" style:font-pitch="variable"/>
    </style:style>
    <style:style style:name="ListLabel_20_32" style:display-name="ListLabel 32" style:family="text">
      <style:text-properties style:font-name="Cambria2" fo:font-family="Cambria" style:font-family-generic="swiss" style:font-pitch="variable"/>
    </style:style>
    <style:style style:name="ListLabel_20_33" style:display-name="ListLabel 33" style:family="text">
      <style:text-properties style:font-name="Cambria2" fo:font-family="Cambria" style:font-family-generic="swiss" style:font-pitch="variable"/>
    </style:style>
    <style:style style:name="ListLabel_20_34" style:display-name="ListLabel 34" style:family="text">
      <style:text-properties style:font-name="Cambria2" fo:font-family="Cambria" style:font-family-generic="swiss" style:font-pitch="variable"/>
    </style:style>
    <style:style style:name="ListLabel_20_35" style:display-name="ListLabel 35" style:family="text">
      <style:text-properties style:font-name="Cambria2" fo:font-family="Cambria" style:font-family-generic="swiss" style:font-pitch="variable"/>
    </style:style>
    <style:style style:name="ListLabel_20_36" style:display-name="ListLabel 36" style:family="text">
      <style:text-properties style:font-name="Cambria2" fo:font-family="Cambria" style:font-family-generic="swiss" style:font-pitch="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ambria1" fo:font-family="Cambria" style:font-family-generic="roman" style:font-pitch="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Cambria1" fo:font-family="Cambria" style:font-family-generic="roman" style:font-pitch="variable"/>
    </style:style>
    <style:style style:name="ListLabel_20_128" style:display-name="ListLabel 128" style:family="text">
      <style:text-properties style:font-name="Cambria1" fo:font-family="Cambria" style:font-family-generic="roman" style:font-pitch="variable"/>
    </style:style>
    <style:style style:name="ListLabel_20_129" style:display-name="ListLabel 129" style:family="text">
      <style:text-properties style:font-name="Cambria1" fo:font-family="Cambria" style:font-family-generic="roman" style:font-pitch="variable"/>
    </style:style>
    <style:style style:name="ListLabel_20_130" style:display-name="ListLabel 130" style:family="text">
      <style:text-properties style:font-name="Cambria1" fo:font-family="Cambria" style:font-family-generic="roman" style:font-pitch="variable"/>
    </style:style>
    <style:style style:name="ListLabel_20_131" style:display-name="ListLabel 131" style:family="text">
      <style:text-properties style:font-name="Cambria1" fo:font-family="Cambria" style:font-family-generic="roman" style:font-pitch="variable"/>
    </style:style>
    <style:style style:name="ListLabel_20_132" style:display-name="ListLabel 132" style:family="text">
      <style:text-properties style:font-name="Cambria1" fo:font-family="Cambria" style:font-family-generic="roman" style:font-pitch="variable"/>
    </style:style>
    <style:style style:name="ListLabel_20_133" style:display-name="ListLabel 133" style:family="text">
      <style:text-properties style:font-name="Cambria1" fo:font-family="Cambria" style:font-family-generic="roman" style:font-pitch="variable"/>
    </style:style>
    <style:style style:name="ListLabel_20_134" style:display-name="ListLabel 134" style:family="text">
      <style:text-properties style:font-name="Cambria1" fo:font-family="Cambria" style:font-family-generic="roman" style:font-pitch="variable"/>
    </style:style>
    <style:style style:name="ListLabel_20_135" style:display-name="ListLabel 135" style:family="text">
      <style:text-properties style:font-name="Cambria1" fo:font-family="Cambria" style:font-family-generic="roman" style:font-pitch="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ambria1" fo:font-family="Cambria" style:font-family-generic="roman" style:font-pitch="variable"/>
    </style:style>
    <style:style style:name="ListLabel_20_155" style:display-name="ListLabel 155" style:family="text">
      <style:text-properties style:font-name="Cambria1" fo:font-family="Cambria" style:font-family-generic="roman" style:font-pitch="variable"/>
    </style:style>
    <style:style style:name="ListLabel_20_156" style:display-name="ListLabel 156" style:family="text">
      <style:text-properties style:font-name="Cambria1" fo:font-family="Cambria" style:font-family-generic="roman" style:font-pitch="variable"/>
    </style:style>
    <style:style style:name="ListLabel_20_157" style:display-name="ListLabel 157" style:family="text">
      <style:text-properties style:font-name="Cambria1" fo:font-family="Cambria" style:font-family-generic="roman" style:font-pitch="variable"/>
    </style:style>
    <style:style style:name="ListLabel_20_158" style:display-name="ListLabel 158" style:family="text">
      <style:text-properties style:font-name="Cambria1" fo:font-family="Cambria" style:font-family-generic="roman" style:font-pitch="variable"/>
    </style:style>
    <style:style style:name="ListLabel_20_159" style:display-name="ListLabel 159" style:family="text">
      <style:text-properties style:font-name="Cambria1" fo:font-family="Cambria" style:font-family-generic="roman" style:font-pitch="variable"/>
    </style:style>
    <style:style style:name="ListLabel_20_160" style:display-name="ListLabel 160" style:family="text">
      <style:text-properties style:font-name="Cambria1" fo:font-family="Cambria" style:font-family-generic="roman" style:font-pitch="variable"/>
    </style:style>
    <style:style style:name="ListLabel_20_161" style:display-name="ListLabel 161" style:family="text">
      <style:text-properties style:font-name="Cambria1" fo:font-family="Cambria" style:font-family-generic="roman" style:font-pitch="variable"/>
    </style:style>
    <style:style style:name="ListLabel_20_162" style:display-name="ListLabel 162" style:family="text">
      <style:text-properties style:font-name="Cambria1" fo:font-family="Cambria" style:font-family-generic="roman" style:font-pitch="variable"/>
    </style:style>
    <style:style style:name="ListLabel_20_163" style:display-name="ListLabel 163" style:family="text">
      <style:text-properties style:font-name="Cambria1" fo:font-family="Cambria" style:font-family-generic="roman" style:font-pitch="variable"/>
    </style:style>
    <style:style style:name="ListLabel_20_164" style:display-name="ListLabel 164" style:family="text">
      <style:text-properties style:font-name="Cambria1" fo:font-family="Cambria" style:font-family-generic="roman" style:font-pitch="variable"/>
    </style:style>
    <style:style style:name="ListLabel_20_165" style:display-name="ListLabel 165" style:family="text">
      <style:text-properties style:font-name="Cambria1" fo:font-family="Cambria" style:font-family-generic="roman" style:font-pitch="variable"/>
    </style:style>
    <style:style style:name="ListLabel_20_166" style:display-name="ListLabel 166" style:family="text">
      <style:text-properties style:font-name="Cambria1" fo:font-family="Cambria" style:font-family-generic="roman" style:font-pitch="variable"/>
    </style:style>
    <style:style style:name="ListLabel_20_167" style:display-name="ListLabel 167" style:family="text">
      <style:text-properties style:font-name="Cambria1" fo:font-family="Cambria" style:font-family-generic="roman" style:font-pitch="variable"/>
    </style:style>
    <style:style style:name="ListLabel_20_168" style:display-name="ListLabel 168" style:family="text">
      <style:text-properties style:font-name="Cambria1" fo:font-family="Cambria" style:font-family-generic="roman" style:font-pitch="variable"/>
    </style:style>
    <style:style style:name="ListLabel_20_169" style:display-name="ListLabel 169" style:family="text">
      <style:text-properties style:font-name="Cambria1" fo:font-family="Cambria" style:font-family-generic="roman" style:font-pitch="variable"/>
    </style:style>
    <style:style style:name="ListLabel_20_170" style:display-name="ListLabel 170" style:family="text">
      <style:text-properties style:font-name="Cambria1" fo:font-family="Cambria" style:font-family-generic="roman" style:font-pitch="variable"/>
    </style:style>
    <style:style style:name="ListLabel_20_171" style:display-name="ListLabel 171" style:family="text">
      <style:text-properties style:font-name="Cambria1" fo:font-family="Cambria" style:font-family-generic="roman" style:font-pitch="variable"/>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ktuelle_20_Liste1" style:display-name="Aktuelle Liste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number text:level="3" text:style-name="ListLabel_20_3" loext:num-list-format="§" style:num-suffix="§" style:num-format="1">
        <style:list-level-properties text:list-level-position-and-space-mode="label-alignment">
          <style:list-level-label-alignment text:label-followed-by="listtab"/>
        </style:list-level-properties>
      </text:list-level-style-number>
      <text:list-level-style-number text:level="4" text:style-name="ListLabel_20_4" loext:num-list-format="·" style:num-suffix="·" style:num-format="1">
        <style:list-level-properties text:list-level-position-and-space-mode="label-alignment">
          <style:list-level-label-alignment text:label-followed-by="listtab"/>
        </style:list-level-properties>
      </text:list-level-style-number>
      <text:list-level-style-number text:level="5" text:style-name="ListLabel_20_5" loext:num-list-format="o" style:num-suffix="o" style:num-format="1">
        <style:list-level-properties text:list-level-position-and-space-mode="label-alignment">
          <style:list-level-label-alignment text:label-followed-by="listtab"/>
        </style:list-level-properties>
      </text:list-level-style-number>
      <text:list-level-style-number text:level="6" text:style-name="ListLabel_20_6" loext:num-list-format="§" style:num-suffix="§" style:num-format="1">
        <style:list-level-properties text:list-level-position-and-space-mode="label-alignment">
          <style:list-level-label-alignment text:label-followed-by="listtab"/>
        </style:list-level-properties>
      </text:list-level-style-number>
      <text:list-level-style-number text:level="7" text:style-name="ListLabel_20_7" loext:num-list-format="·" style:num-suffix="·" style:num-format="1">
        <style:list-level-properties text:list-level-position-and-space-mode="label-alignment">
          <style:list-level-label-alignment text:label-followed-by="listtab"/>
        </style:list-level-properties>
      </text:list-level-style-number>
      <text:list-level-style-number text:level="8" text:style-name="ListLabel_20_8" loext:num-list-format="o" style:num-suffix="o" style:num-format="1">
        <style:list-level-properties text:list-level-position-and-space-mode="label-alignment">
          <style:list-level-label-alignment text:label-followed-by="listtab"/>
        </style:list-level-properties>
      </text:list-level-style-number>
      <text:list-level-style-number text:level="9" text:style-name="ListLabel_20_9" loext:num-list-format="§"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prefix="("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prefix="("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48" loext:num-list-format="(%4%)" style:num-prefix="("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prefix="("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prefix="("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51" loext:num-list-format="(%7%)" style:num-prefix="("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prefix="("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prefix="("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prefix="("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space"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space"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space"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space"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space"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space"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space"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space"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space"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space"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space"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space"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space"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space"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space"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space"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space"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space"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space"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space"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space"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space"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space"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space"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space"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space"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space"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space"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space"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space"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space"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space"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space"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space"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space"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space"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space"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space"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space"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space"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space" fo:text-indent="-0.25in" fo:margin-left="1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space" fo:text-indent="-0.1252in" fo:margin-left="1.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space" fo:text-indent="-0.2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space" fo:text-indent="-0.25in" fo:margin-left="2.5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space" fo:text-indent="-0.1252in" fo:margin-left="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space" fo:text-indent="-0.2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space" fo:text-indent="-0.25in" fo:margin-left="4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space"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in" fo:margin-bottom="0in" style:contextual-spacing="false" fo:text-align="end" style:justify-single-word="false" loext:word-spacing-minimum="75%" loext:word-spacing-maximum="133%"/>
    </style:style>
    <style:style style:name="MP2" style:family="paragraph" style:parent-style-name="Footer">
      <style:paragraph-properties fo:text-align="start" style:justify-single-word="false" loext:word-spacing-minimum="75%" loext:word-spacing-maximum="133%"/>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2681in" fo:page-height="11.6929in" style:num-format="1" style:print-orientation="landscape" fo:margin-top="0.4917in" fo:margin-bottom="0.4917in" fo:margin-left="0.9839in" fo:margin-right="0.9839in" style:writing-mode="lr-tb" style:layout-grid-color="#c0c0c0" style:layout-grid-lines="2520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Grafik 1" text:anchor-type="char" svg:y="0.0083in" svg:width="2.8543in" svg:height="0.628in" draw:z-index="3"><draw:image xlink:href="Pictures/10000001000001F40000006E64594E3A.png" xlink:type="simple" xlink:show="embed" xlink:actuate="onLoad" draw:mime-type="image/png"/><svg:desc>https://www.ostfalia.de/export/system/modules/de.ostfalia.module.template/resources/images/logo/Ostfalia_German.png_230952558.png</svg:desc></draw:frame><text:tab/><text:tab/>Prof. Dr. Claus Fühner</text:p>
        <text:p text:style-name="MP1">Ostfalia Hochschule, Informatik</text:p>
        <text:p text:style-name="Header"><text:tab/><text:tab/>Betriebssysteme</text:p>
      </style:header>
      <style:footer>
        <text:p text:style-name="MP2"><text:tab/>Seite <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laus Fühner</meta:initial-creator>
    <meta:editing-cycles>33</meta:editing-cycles>
    <meta:creation-date>2023-03-03T15:56:00</meta:creation-date>
    <dc:date>2026-04-15T13:36:18.424238482</dc:date>
    <meta:editing-duration>PT9M32S</meta:editing-duration>
    <meta:generator>LibreOffice/25.8.6.2$Linux_X86_64 LibreOffice_project/580$Build-2</meta:generator>
    <meta:document-statistic meta:table-count="0" meta:image-count="1" meta:object-count="0" meta:page-count="4" meta:paragraph-count="85" meta:word-count="1003" meta:character-count="6455" meta:non-whitespace-character-count="5545"/>
    <meta:user-defined meta:name="AppVersion">16.0000</meta:user-defined>
    <meta:template xlink:type="simple" xlink:actuate="onRequest" xlink:title="Normal.dotm" xlink:href=""/>
  </office:meta>
</office:document-meta>
</file>