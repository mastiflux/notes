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06E64594E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17" svg:font-family="F17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4271in" fo:margin-top="0in" fo:margin-bottom="0in" table:align="center" style:writing-mode="lr-tb"/>
    </style:style>
    <style:style style:name="Table1.A" style:family="table-column">
      <style:table-column-properties style:column-width="0.8292in"/>
    </style:style>
    <style:style style:name="Table1.B" style:family="table-column">
      <style:table-column-properties style:column-width="3.5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language="de" fo:country="DE" style:letter-kerning="false" style:font-name-asian="ＭＳ 明朝" style:language-asian="de" style:country-asian="DE" style:language-complex="ar" style:country-complex="SA"/>
    </style:style>
    <style:style style:name="P4" style:family="paragraph" style:parent-style-name="Lösung">
      <style:text-properties officeooo:rsid="0012b211" officeooo:paragraph-rsid="0012b211"/>
    </style:style>
    <style:style style:name="P5" style:family="paragraph" style:parent-style-name="Lösung">
      <style:text-properties officeooo:rsid="00132866" officeooo:paragraph-rsid="00132866"/>
    </style:style>
    <style:style style:name="P6" style:family="paragraph" style:parent-style-name="Lösung">
      <style:text-properties officeooo:rsid="0013db0f" officeooo:paragraph-rsid="0013db0f"/>
    </style:style>
    <style:style style:name="P7" style:family="paragraph" style:parent-style-name="Lösung">
      <style:text-properties officeooo:rsid="00158432" officeooo:paragraph-rsid="00158432"/>
    </style:style>
    <style:style style:name="P8" style:family="paragraph" style:parent-style-name="Lösung">
      <style:text-properties officeooo:rsid="0016ec49" officeooo:paragraph-rsid="0016ec49"/>
    </style:style>
    <style:style style:name="P9" style:family="paragraph" style:parent-style-name="No_20_Spacing">
      <style:paragraph-properties fo:text-align="justify" style:justify-single-word="false"/>
    </style:style>
    <style:style style:name="P10" style:family="paragraph" style:parent-style-name="Aufgabe" style:list-style-name="WWNum29"/>
    <style:style style:name="P11" style:family="paragraph" style:parent-style-name="Lösung">
      <style:text-properties officeooo:rsid="0012b211" officeooo:paragraph-rsid="0012b211"/>
    </style:style>
    <style:style style:name="P12" style:family="paragraph" style:parent-style-name="Lösung">
      <style:text-properties fo:font-size="12pt" fo:font-weight="normal" officeooo:paragraph-rsid="0016ec49" style:font-size-asian="12pt" style:font-weight-asian="normal" style:font-size-complex="12pt"/>
    </style:style>
    <style:style style:name="P13" style:family="paragraph" style:parent-style-name="Lösung">
      <style:text-properties fo:font-size="12pt" fo:font-weight="normal" style:font-size-asian="12pt" style:font-weight-asian="normal" style:font-size-complex="12pt"/>
    </style:style>
    <style:style style:name="P14" style:family="paragraph" style:parent-style-name="Lösung">
      <style:text-properties fo:font-size="12pt" fo:font-weight="normal" officeooo:paragraph-rsid="00183aa2" style:font-size-asian="12pt" style:font-weight-asian="normal" style:font-size-complex="12pt"/>
    </style:style>
    <style:style style:name="P15" style:family="paragraph" style:parent-style-name="Lösung">
      <style:text-properties officeooo:rsid="00192e83" officeooo:paragraph-rsid="00192e83"/>
    </style:style>
    <style:style style:name="T1" style:family="text">
      <style:text-properties fo:color="#345a8a" loext:opacity="100%" style:font-name="Calibri" style:font-name-asian="Calibri1" style:font-name-complex="Calibri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size="12pt" fo:font-weight="normal" officeooo:rsid="0016ec49" style:font-size-asian="12pt" style:font-weight-asian="normal" style:font-size-complex="12pt"/>
    </style:style>
    <style:style style:name="T5" style:family="text">
      <style:text-properties fo:font-size="12pt" fo:font-weight="normal" officeooo:rsid="00183aa2" style:font-size-asian="12pt" style:font-weight-asian="normal" style:font-size-complex="12pt"/>
    </style:style>
    <style:style style:name="T6" style:family="text">
      <style:text-properties style:font-name="Consolas" fo:font-size="12pt" fo:font-weight="normal" style:font-size-asian="12pt" style:font-weight-asian="normal" style:font-name-complex="Consolas1" style:font-size-complex="12pt"/>
    </style:style>
    <style:style style:name="T7" style:family="text">
      <style:text-properties style:font-name="Consolas" style:font-name-complex="Consolas1"/>
    </style:style>
    <style:style style:name="T8" style:family="text">
      <style:text-properties style:font-name="Consolas" officeooo:rsid="0012b211" style:font-name-complex="Consolas1"/>
    </style:style>
    <style:style style:name="T9" style:family="text">
      <style:text-properties officeooo:rsid="00132866"/>
    </style:style>
    <style:style style:name="T10" style:family="text">
      <style:text-properties officeooo:rsid="00158432"/>
    </style:style>
    <style:style style:name="T11" style:family="text">
      <style:text-properties officeooo:rsid="0017093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Praktikum 01: Kennenlernen der Kommandozeile, Pfade und Dateien</text:span><text:span text:style-name="T1"/></text:h>
      <text:p text:style-name="Standard">Jeweils 1 Punkt für die Lösung pro Aufgabe, wenn Sie uns davon überzeugen, die Lösung verstanden zu haben. <text:span text:style-name="T2">Bitte notieren Sie die Kommandos und ggf. auch die Ausgabe!</text:span></text:p>
      <text:list text:style-name="WWNum29">
        <text:list-item>
          <text:p text:style-name="P10" loext:marker-style-name="T3"><text:span text:style-name="Formatvorlage1"><text:span text:style-name="T3">Wie stellen Sie den absoluten Pfad des aktuellen Verzeichnisses fest?</text:span></text:span><text:span text:style-name="T3"/></text:p>
        </text:list-item>
      </text:list>
      <text:p text:style-name="P4">­Ich gebe in der shell den Befehl pwd ein (print working directory)</text:p>
      <text:p text:style-name="Lösung"/>
      <text:list text:continue-numbering="true" text:style-name="WWNum29">
        <text:list-item>
          <text:p text:style-name="P10" loext:marker-style-name="T3"><text:span text:style-name="Formatvorlage1"><text:span text:style-name="T3">Listen Sie alle (auch versteckte!) Dateien in Ihrem Homeverzeichnis auf.</text:span></text:span><text:span text:style-name="T3"/></text:p>
        </text:list-item>
      </text:list>
      <text:p text:style-name="P4">Ich gebe in der shell ls -a ein (listet alle Dateien im aktuellen Verzeichnis)</text:p>
      <text:p text:style-name="Lösung"/>
      <text:list text:continue-numbering="true" text:style-name="WWNum29">
        <text:list-item>
          <text:p text:style-name="P10" loext:marker-style-name="T3"><text:span text:style-name="Formatvorlage1"><text:span text:style-name="T3">Wie bestimmt man auf der Shell, ob es sich um einen internen oder einen externen Befehl handelt? Geben Sie das Ergebnis für </text:span></text:span><text:span text:style-name="Formatvorlage1"><text:span text:style-name="T6">cd</text:span></text:span><text:span text:style-name="Formatvorlage1"><text:span text:style-name="T3">, </text:span></text:span><text:span text:style-name="Formatvorlage1"><text:span text:style-name="T6">pwd</text:span></text:span><text:span text:style-name="Formatvorlage1"><text:span text:style-name="T3"> und </text:span></text:span><text:span text:style-name="Formatvorlage1"><text:span text:style-name="T6">ls</text:span></text:span><text:span text:style-name="Formatvorlage1"><text:span text:style-name="T3"> an!</text:span></text:span></text:p>
        </text:list-item>
      </text:list>
      <text:p text:style-name="Lösung" loext:marker-style-name="T7"><text:span text:style-name="T7">cd:</text:span><text:span text:style-name="T8">intern</text:span></text:p>
      <text:p text:style-name="Lösung" loext:marker-style-name="T7"><text:span text:style-name="T7">pwd:</text:span><text:span text:style-name="T8">intern</text:span></text:p>
      <text:p text:style-name="Lösung" loext:marker-style-name="T7"><text:span text:style-name="T7">ls:</text:span><text:span text:style-name="T8">extern</text:span></text:p>
      <text:p text:style-name="P4" loext:marker-style-name="T7"><text:span text:style-name="T7">Um den Typ zu überprüfen gibt man type BEFEHL ein (bspw. type cd)</text:span></text:p>
      <text:list text:continue-numbering="true" text:style-name="WWNum29">
        <text:list-item>
          <text:p text:style-name="P10">Wie können Sie die letzten Befehle aufrufen und korrigieren? Wozu nutzt die Shell die Tabulator-Taste?</text:p>
        </text:list-item>
      </text:list>
      <text:p text:style-name="P4">Mit den Pfeiltasten hoch und runter kann man vorherige Befehle aufrufen und korrigieren, die Tabulatortaste dient zur automatischen Vervollständigung oder auch dazu, die möglichen Befehle anzuzeigen.</text:p>
      <text:p text:style-name="Lösung"/>
      <text:list text:continue-numbering="true" text:style-name="WWNum29">
        <text:list-item>
          <text:p text:style-name="P10">Rufen Sie den Befehl aus Aufgabe 2 über die Befehlsnummer aus der Historie auf.</text:p>
        </text:list-item>
      </text:list>
      <text:p text:style-name="Lösung">. <text:s text:c="13"/>.cert <text:s text:c="8"/>eclipse-workspace <text:s/>.m2 <text:s text:c="9"/>.redhat <text:s text:c="20"/>.thunderbird</text:p>
      <text:p text:style-name="Lösung">.. <text:s text:c="12"/>changes.txt <text:s text:c="2"/>.emacs.d <text:s text:c="10"/>.mono <text:s text:c="7"/>setlX <text:s text:c="22"/>.var</text:p>
      <text:p text:style-name="Lösung">Arduino <text:s text:c="7"/>.config <text:s text:c="6"/>.gitconfig <text:s text:c="8"/>.mozilla <text:s text:c="4"/>signal-desktop-keyring.gpg <text:s/>Videos</text:p>
      <text:p text:style-name="Lösung">.arduino15 <text:s text:c="4"/>Desktop <text:s text:c="6"/>.gk <text:s text:c="15"/>Music <text:s text:c="7"/>signal-desktop.sources <text:s text:c="5"/>.vscode</text:p>
      <text:p text:style-name="Lösung"><text:soft-page-break/>.arduinoIDE <text:s text:c="3"/>.digital.cfg <text:s/>.gtkrc-2.0 <text:s text:c="8"/>.p2 <text:s text:c="9"/>.steam <text:s text:c="21"/>.Xauthority</text:p>
      <text:p text:style-name="Lösung">.bash_history <text:s/>.dmrc <text:s text:c="8"/>.gtkrc-xfce <text:s text:c="7"/>Pictures <text:s text:c="4"/>.steampath <text:s text:c="17"/>.xsession-errors</text:p>
      <text:p text:style-name="Lösung">.bash_logout <text:s text:c="2"/>Documents <text:s text:c="4"/>.java <text:s text:c="13"/>.pki <text:s text:c="8"/>.steampid <text:s text:c="18"/>.xsession-errors.old</text:p>
      <text:p text:style-name="Lösung">.bashrc <text:s text:c="7"/>.dotnet <text:s text:c="6"/>.lesshst <text:s text:c="10"/>.platformio <text:s/>.sudo_as_admin_successful</text:p>
      <text:p text:style-name="Lösung">bin <text:s text:c="11"/>Downloads <text:s text:c="4"/>.linuxmint <text:s text:c="8"/>.profile <text:s text:c="4"/>.swt</text:p>
      <text:p text:style-name="Lösung">.cache <text:s text:c="8"/>.eclipse <text:s text:c="5"/>.local <text:s text:c="12"/>Public <text:s text:c="6"/>Templates</text:p>
      <text:p text:style-name="Lösung"/>
      <text:list text:continue-numbering="true" text:style-name="WWNum29">
        <text:list-item>
          <text:p text:style-name="P10">Geben Sie zur Datei <text:span text:style-name="T7">/usr/bin/X11/X</text:span> den relativen Pfad und den absoluten Pfad aus dem Verzeichnis <text:span text:style-name="T7">/usr/include/linux</text:span> an (bitte theoretisch lösen, falls die Dateien nicht existieren).</text:p>
        </text:list-item>
      </text:list>
      <text:p text:style-name="Lösung">Relativ: <text:span text:style-name="T9">~/usr/bin/X11/x</text:span></text:p>
      <text:p text:style-name="Lösung"><text:span text:style-name="T9">A</text:span>bsolut: /<text:span text:style-name="T9">home/usr/include/linux</text:span></text:p>
      <text:list text:continue-numbering="true" text:style-name="WWNum29">
        <text:list-item>
          <text:p text:style-name="P10" loext:marker-style-name="T3"><text:span text:style-name="Formatvorlage1"><text:span text:style-name="T3">Wie können Sie feststellen, ob Sie sich in Ihrem Homeverzeichnis befinden (Tipp: wechseln Sie die Verzeichnisse und achten Sie auf das Prompt)?</text:span></text:span><text:span text:style-name="T3"/></text:p>
        </text:list-item>
      </text:list>
      <text:p text:style-name="P5">Mit pwd kann man sich anzeigen lassen in <text:s/>welchem verzeivhnis man sich befindet und somit auch sehen ob man im Homeverzeichnis ist oder nicht.</text:p>
      <text:p text:style-name="Lösung"/>
      <text:list text:continue-numbering="true" text:style-name="WWNum29">
        <text:list-item>
          <text:p text:style-name="P10">Erstellen Sie in Ihrem Home-Verzeichnis sowohl versteckte als auch reguläre Dateien und Verzeichnisse. Überprüfen Sie das Ergebnis.</text:p>
        </text:list-item>
      </text:list>
      <text:p text:style-name="P6">mkdir verzeichnis</text:p>
      <text:p text:style-name="P6">mkdir .verstecktesverzeichnis</text:p>
      <text:list text:continue-numbering="true" text:style-name="WWNum29">
        <text:list-item>
          <text:p text:style-name="P10">Erstellen Sie drei Kopien einer der erzeugten Dateien: (1) eine unter anderem Namen im gleichen Verzeichnis, (2) eine unter gleichem Namen in einem anderen Verzeichnis und (3) eine unter anderem Namen in einem anderen Verzeichnis. Prüfen Sie das Ergebnis.</text:p>
        </text:list-item>
      </text:list>
      <text:p text:style-name="P6">touch datei.txt (erstellen) </text:p>
      <text:p text:style-name="P6">cp datei.txt <text:span text:style-name="T10">~/Documents/</text:span> (kopieren ohne Namen zu ändern)</text:p>
      <text:p text:style-name="P7">cp datei.txt ~/Documents/NeuerName.txt</text:p>
      <text:list text:continue-numbering="true" text:style-name="WWNum29">
        <text:list-item>
          <text:p text:style-name="P10"><text:soft-page-break/>Verschieben Sie eine der erzeugten Dateien in eines der erzeugten Verzeichnisse. Prüfen Sie das Ergebnis.</text:p>
        </text:list-item>
      </text:list>
      <text:p text:style-name="P7">mv datei.txt ~/Documents/Ostfalia/verzeichnis/</text:p>
      <text:p text:style-name="Lösung"/>
      <text:list text:continue-numbering="true" text:style-name="WWNum29">
        <text:list-item>
          <text:p text:style-name="P10">Wechseln Sie in eines der erzeugten Verzeichnisse. Erstellen Sie dort eine weitere Datei. Schreiben Sie mit dem Editor <text:span text:style-name="T7">vi</text:span> Ihren Namen in die Datei. Wie verlässt man diesen Editor? Geben Sie -ohne einen Editor zu verwenden- den Dateiinhalt auf der Konsole aus.</text:p>
        </text:list-item>
      </text:list>
      <text:p text:style-name="P7">vi name.txt dann i drücken für insert modus, dann esc um in den command modus zu wechseln und dann :wq un zu speichern und den Editor zu verlassen</text:p>
      <text:p text:style-name="Lösung"/>
      <text:list text:continue-numbering="true" text:style-name="WWNum29">
        <text:list-item>
          <text:p text:style-name="P10">Ändern Sie den Zeitstempel der Datei auf gestern und prüfen das Ergebnis.</text:p>
        </text:list-item>
      </text:list>
      <text:p text:style-name="P8">touch -t 202603100000 name.txt</text:p>
      <text:p text:style-name="P8">prüfen mit: ls -l</text:p>
      <text:list text:continue-numbering="true" text:style-name="WWNum29">
        <text:list-item>
          <text:p text:style-name="P10">Löschen Sie ein Verzeichnis, in dem sich keine Dateien befinden.</text:p>
        </text:list-item>
      </text:list>
      <text:p text:style-name="P8">rm ../.hiddenverzeichnis</text:p>
      <text:p text:style-name="Lösung"/>
      <text:list text:continue-numbering="true" text:style-name="WWNum29">
        <text:list-item>
          <text:p text:style-name="P10">Löschen Sie ein Verzeichnis, in dem sich Dateien befinden (inklusive der darin befindelichen Dateien).</text:p>
        </text:list-item>
      </text:list>
      <text:p text:style-name="P8">rm -r ./verzeichnis/</text:p>
      <text:p text:style-name="Lösung"/>
      <text:list text:continue-numbering="true" text:style-name="WWNum29">
        <text:list-item>
          <text:p text:style-name="P10" loext:marker-style-name="T3"><text:span text:style-name="Formatvorlage1"><text:span text:style-name="T3">Stellen Sie fest, als welcher Benutzer Sie angemeldet sind. </text:span></text:span><text:span text:style-name="T3"/></text:p>
        </text:list-item>
      </text:list>
      <text:p text:style-name="P12" loext:marker-style-name="T3"><text:span text:style-name="Formatvorlage1"><text:span text:style-name="T4">whoami</text:span></text:span></text:p>
      <text:list text:continue-numbering="true" text:style-name="WWNum29">
        <text:list-item>
          <text:p text:style-name="P10" loext:marker-style-name="T3"><text:span text:style-name="Formatvorlage1"><text:span text:style-name="T3">Welche weiteren Benutzer sind aktuell noch außer Ihnen am System angemeldet?</text:span></text:span></text:p>
        </text:list-item>
      </text:list>
      <text:p text:style-name="P12" loext:marker-style-name="T3"><text:span text:style-name="Formatvorlage1"><text:span text:style-name="T4">w</text:span></text:span></text:p>
      <text:p text:style-name="P12" loext:marker-style-name="T3"><text:span text:style-name="Formatvorlage1"><text:span text:style-name="T3">13:09:58 up 9 days, <text:s/>5:13, <text:s/>1 user, <text:s/>load average: 1,12, 0,97, 0,84</text:span></text:span></text:p>
      <text:p text:style-name="P12" loext:marker-style-name="T3"><text:span text:style-name="Formatvorlage1"><text:span text:style-name="T3">USER <text:s text:c="4"/>TTY <text:s text:c="5"/>FROM <text:s text:c="12"/>LOGIN@ <text:s text:c="2"/>IDLE <text:s text:c="2"/>JCPU <text:s text:c="2"/>PCPU <text:s/>WHAT</text:span></text:span></text:p>
      <text:p text:style-name="P12" loext:marker-style-name="T3"><text:span text:style-name="Formatvorlage1"><text:span text:style-name="T3">fhaese <text:s text:c="11"/>- <text:s text:c="15"/>02Mar26 42:34 <text:s text:c="2"/>0.00s <text:s/>0.15s lightdm --session-child 13 20</text:span></text:span></text:p>
      <text:list text:continue-numbering="true" text:style-name="WWNum29">
        <text:list-item>
          <text:p text:style-name="P10" loext:marker-style-name="T3"><text:soft-page-break/><text:span text:style-name="Formatvorlage1"><text:span text:style-name="T3">Ohne das Internet zu nutzen: Wie können Sie ausführliche Informationen zum Kommando </text:span></text:span><text:span text:style-name="Formatvorlage1"><text:span text:style-name="T6">ls</text:span></text:span><text:span text:style-name="Formatvorlage1"><text:span text:style-name="T3"> erhalten?</text:span></text:span></text:p>
        </text:list-item>
      </text:list>
      <text:p text:style-name="P7">ls--help</text:p>
      <text:p text:style-name="Lösung"/>
      <text:list text:continue-numbering="true" text:style-name="WWNum29">
        <text:list-item>
          <text:p text:style-name="P10" loext:marker-style-name="T3"><text:span text:style-name="Formatvorlage1"><text:span text:style-name="T3">Welche Nutzer waren zuletzt angemeldet (Tipp: siehe Kommandoliste unten und Manual)?</text:span></text:span><text:span text:style-name="T3"/></text:p>
        </text:list-item>
      </text:list>
      <text:p text:style-name="P14" loext:marker-style-name="T3"><text:span text:style-name="Formatvorlage1"><text:span text:style-name="T5">last</text:span></text:span></text:p>
      <text:p text:style-name="P13" loext:marker-style-name="T3"><text:span text:style-name="Formatvorlage1"><text:span text:style-name="T3"/></text:span></text:p>
      <text:list text:continue-numbering="true" text:style-name="WWNum29">
        <text:list-item>
          <text:p text:style-name="P10">Stellen Sie mit den Namen und das Release des Betriebssystemkernels sowie den Typ der Prozessorarchitektur fest (Tipp: siehe Kommandoliste unten und Manual).</text:p>
        </text:list-item>
      </text:list>
      <text:p text:style-name="P8">uname -srm</text:p>
      <text:p text:style-name="Lösung">Linux 6.17.0-14-generic x86_64</text:p>
      <text:p text:style-name="P15">für mehr Infos: more /etc/os-release</text:p>
      <text:list text:continue-numbering="true" text:style-name="WWNum29">
        <text:list-item>
          <text:p text:style-name="P10">Welche Information gibt das Kommando <text:span text:style-name="T7">uptime</text:span> aus (Tipp: siehe Manual)?</text:p>
        </text:list-item>
      </text:list>
      <text:p text:style-name="P8">Sie gibt aus wie lange das System bisher läuft, also eingeschaltet ist.</text:p>
      <text:p text:style-name="Lösung"/>
      <text:list text:continue-numbering="true" text:style-name="WWNum29">
        <text:list-item>
          <text:p text:style-name="P10">Definieren Sie einen <text:span text:style-name="T7">alias</text:span>, der dafür sorgt, dass Sie das Kommando <text:span text:style-name="T7">ls -AlF</text:span> mit <text:span text:style-name="T7">ll</text:span> abkürzen können. Testen Sie dies. Machen Sie diese Alias-Definition im nächsten Schritt durch Änderung der <text:span text:style-name="T7">.bashrc</text:span>/<text:span text:style-name="T7">.zshrc</text:span> mit <text:span text:style-name="T7">vi</text:span> permanent. Prüfen Sie dies in einem neuen Terminal.</text:p>
        </text:list-item>
      </text:list>
      <text:p text:style-name="Lösung">alias ll='ls -AlF' <text:span text:style-name="T11">in der bashrc einfügen </text:span></text:p>
      <text:p text:style-name="Standard"/>
      <text:p text:style-name="Standard">Zur Bearbeitung des Übungszettels haben wir ca. __<text:span text:style-name="T11">60</text:span>__ Minuten pro Person benötigt.</text:p>
      <text:p text:style-name="Standard"/>
      <text:h text:style-name="Heading_20_2" text:outline-level="2">Hilfestellung</text:h>
      <text:p text:style-name="P9">Zur Bearbeitung des Praktikums sind unter anderem folgende Befehle nützlich:</text:p>
      <text:p text:style-name="No_20_Spacing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code">apropos</text:span></text:p>
          </table:table-cell>
          <table:table-cell table:style-name="Table1.A1" office:value-type="string">
            <text:p text:style-name="P3">Suche in Manual-Pages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cd </text:span></text:p>
          </table:table-cell>
          <table:table-cell table:style-name="Table1.A1" office:value-type="string">
            <text:p text:style-name="P3">Wechselt in ein anderes Verzeichnis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finger</text:span></text:p>
          </table:table-cell>
          <table:table-cell table:style-name="Table1.A1" office:value-type="string">
            <text:p text:style-name="P3">Informationen über Benutzer abfragen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code">head</text:span></text:p>
          </table:table-cell>
          <table:table-cell table:style-name="Table1.A1" office:value-type="string">
            <text:p text:style-name="P3">Erste Zeilen einer Datei ausgeb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history</text:span></text:p>
          </table:table-cell>
          <table:table-cell table:style-name="Table1.A1" office:value-type="string">
            <text:p text:style-name="P3">Befehlshistorie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last</text:span></text:p>
          </table:table-cell>
          <table:table-cell table:style-name="Table1.A1" office:value-type="string">
            <text:p text:style-name="P3">An- und Abmeldezeiten von Benutzer ausgeb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less</text:span></text:p>
          </table:table-cell>
          <table:table-cell table:style-name="Table1.A1" office:value-type="string">
            <text:p text:style-name="P3">Ausgabe Seitenweise anzeig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man</text:span></text:p>
          </table:table-cell>
          <table:table-cell table:style-name="Table1.A1" office:value-type="string">
            <text:p text:style-name="P3">Manual-Pages anzeig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mkdir</text:span></text:p>
          </table:table-cell>
          <table:table-cell table:style-name="Table1.A1" office:value-type="string">
            <text:p text:style-name="P3">Erstellt ein Verzeichnis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more</text:span></text:p>
          </table:table-cell>
          <table:table-cell table:style-name="Table1.A1" office:value-type="string">
            <text:p text:style-name="P3">Dateiinhalt seitenweise anzeig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mv</text:span></text:p>
          </table:table-cell>
          <table:table-cell table:style-name="Table1.A1" office:value-type="string">
            <text:p text:style-name="P3">Datei verschieb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nano</text:span></text:p>
          </table:table-cell>
          <table:table-cell table:style-name="Table1.A1" office:value-type="string">
            <text:p text:style-name="P3">Einfacher konsolenbasierter Editor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pwd</text:span></text:p>
          </table:table-cell>
          <table:table-cell table:style-name="Table1.A1" office:value-type="string">
            <text:p text:style-name="P3">Liefert die aktuelle Positio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rm</text:span></text:p>
          </table:table-cell>
          <table:table-cell table:style-name="Table1.A1" office:value-type="string">
            <text:p text:style-name="P3">Datei lösch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rmdir</text:span></text:p>
          </table:table-cell>
          <table:table-cell table:style-name="Table1.A1" office:value-type="string">
            <text:p text:style-name="P3">Löscht Verzeichnis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touch</text:span></text:p>
          </table:table-cell>
          <table:table-cell table:style-name="Table1.A1" office:value-type="string">
            <text:p text:style-name="P3">Zeiten für Dateien oder Verzeichnisse änder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uname</text:span></text:p>
          </table:table-cell>
          <table:table-cell table:style-name="Table1.A1" office:value-type="string">
            <text:p text:style-name="P3">Name etc. des UNIX-Systems ausgeb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uptime</text:span></text:p>
          </table:table-cell>
          <table:table-cell table:style-name="Table1.A1" office:value-type="string">
            <text:p text:style-name="P3">Uptime anzeig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vi</text:span></text:p>
          </table:table-cell>
          <table:table-cell table:style-name="Table1.A1" office:value-type="string">
            <text:p text:style-name="P3">Einfacher konsolenbasierter Editor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w</text:span></text:p>
          </table:table-cell>
          <table:table-cell table:style-name="Table1.A1" office:value-type="string">
            <text:p text:style-name="P3">Liste der angemeldeten Benutzer ausgeb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wc</text:span></text:p>
          </table:table-cell>
          <table:table-cell table:style-name="Table1.A1" office:value-type="string">
            <text:p text:style-name="P3">Word Count (auf für Zeichen oder Zeilen)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whatis</text:span></text:p>
          </table:table-cell>
          <table:table-cell table:style-name="Table1.A1" office:value-type="string">
            <text:p text:style-name="P3">Kurzbeschreibungen eines Befehls ausgeb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who</text:span></text:p>
          </table:table-cell>
          <table:table-cell table:style-name="Table1.A1" office:value-type="string">
            <text:p text:style-name="P3">Liste der angemeldeten Benutzer ausgeben</text:p>
          </table:table-cell>
        </table:table-row>
        <table:table-row table:style-name="Table1.1">
          <table:table-cell table:style-name="Table1.A1" office:value-type="string">
            <text:p text:style-name="P3"><text:span text:style-name="code">whoami</text:span></text:p>
          </table:table-cell>
          <table:table-cell table:style-name="Table1.A1" office:value-type="string">
            <text:p text:style-name="P3">Ausgeben des eigenen Account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17" svg:font-family="F17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de" style:country-asian="DE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10%" fo:text-align="justify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Sprechblasentext_20_Zchn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.0835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cument_20_Map" style:display-name="Document Map" style:family="paragraph" style:parent-style-name="Standard" loext:linked-style-name="Dokumentstruktur_20_Zchn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Aufgabe" style:family="paragraph" style:parent-style-name="Standard" style:next-style-name="Lösung" style:list-style-name="WWNum29"/>
    <style:style style:name="HTML_20_Preformatted" style:display-name="HTML Preformatted" style:family="paragraph" style:parent-style-name="Standard" loext:linked-style-name="HTML_20_Vorformatiert_20_Zchn">
      <style:paragraph-properties fo:margin-top="0in" fo:margin-bottom="0in" style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ösung" style:family="paragraph" style:parent-style-name="Standard">
      <style:paragraph-properties fo:padding-left="0.0555in" fo:padding-right="0.0555in" fo:padding-top="0.0138in" fo:padding-bottom="0.0138in" fo:border="0.51pt solid #000000" style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Überschrift_20_1_20_Zchn" style:display-name="Überschrift 1 Zchn" style:family="text" style:parent-style-name="Default_20_Paragraph_20_Font" loext:linked-style-name="Heading_20_1">
      <style:text-properties fo:color="#345a8a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Dokumentstruktur_20_Zchn" style:display-name="Dokumentstruktur Zchn" style:family="text" style:parent-style-name="Default_20_Paragraph_20_Font" loext:linked-style-name="Document_20_Map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365f91" loext:opacity="100%" style:font-name="Calibri" fo:font-family="Calibri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-pds" style:family="text" style:parent-style-name="Default_20_Paragraph_20_Font"/>
    <style:style style:name="pl-smi" style:family="text" style:parent-style-name="Default_20_Paragraph_20_Font"/>
    <style:style style:name="code" style:family="text" style:parent-style-name="Default_20_Paragraph_20_Font">
      <style:text-properties style:font-name="Courier New" fo:font-family="'Courier New'" style:font-family-generic="roman" style:font-pitch="variable" fo:font-size="11pt" style:font-size-asian="11pt" style:font-name-complex="F17" style:font-family-complex="F17" style:font-family-generic-complex="system" style:font-pitch-complex="variable"/>
    </style:style>
    <style:style style:name="Formatvorlage1" style:family="text" style:parent-style-name="Default_20_Paragraph_20_Font">
      <style:text-properties style:font-name="Cambria" fo:font-family="Cambria" style:font-family-generic="roman" style:font-pitch="variable" fo:font-size="11pt" fo:font-weight="bold" style:font-size-asian="11pt" style:font-weight-asian="bold" style:font-size-complex="16pt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a" style:family="text" style:parent-style-name="Default_20_Paragraph_20_Font"/>
    <style:style style:name="pi" style:family="text" style:parent-style-name="Default_20_Paragraph_20_Font"/>
    <style:style style:name="s2" style:family="text" style:parent-style-name="Default_20_Paragraph_20_Font"/>
    <style:style style:name="s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ktuelle_20_Liste1" style:display-name="Aktuelle List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.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12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4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(%7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(%9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15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-Design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 1" text:anchor-type="char" svg:y="0.0083in" svg:width="2.8543in" svg:height="0.628in" draw:z-index="4"><draw:image xlink:href="Pictures/10000001000001F40000006E64594E3A.png" xlink:type="simple" xlink:show="embed" xlink:actuate="onLoad" draw:mime-type="image/png"/><svg:desc>https://www.ostfalia.de/export/system/modules/de.ostfalia.module.template/resources/images/logo/Ostfalia_German.png_230952558.png</svg:desc></draw:frame><text:tab/><text:tab/>Prof. Dr. Claus Fühner</text:p>
        <text:p text:style-name="MP1">Ostfalia Hochschule, Informatik</text:p>
        <text:p text:style-name="Header"><text:tab/><text:tab/>Betriebssysteme</text:p>
      </style:header>
      <style:footer>
        <text:p text:style-name="MP2"><text:tab/>Seite 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 Fühner</meta:initial-creator>
    <meta:editing-cycles>10</meta:editing-cycles>
    <meta:print-date>2026-03-12T13:04:58.046412538</meta:print-date>
    <meta:creation-date>2026-03-09T10:09:00</meta:creation-date>
    <dc:date>2026-03-12T13:06:21.264664994</dc:date>
    <meta:editing-duration>PT14M56S</meta:editing-duration>
    <meta:generator>LibreOffice/24.2.7.2$Linux_X86_64 LibreOffice_project/420$Build-2</meta:generator>
    <meta:printed-by>PDF files</meta:printed-by>
    <meta:document-statistic meta:table-count="1" meta:image-count="1" meta:object-count="0" meta:page-count="5" meta:paragraph-count="121" meta:word-count="874" meta:character-count="6375" meta:non-whitespace-character-count="5203"/>
    <meta:user-defined meta:name="AppVersion">16.0000</meta:user-defined>
    <meta:template xlink:type="simple" xlink:actuate="onRequest" xlink:title="Normal.dotm" xlink:href=""/>
  </office:meta>
</office:document-meta>
</file>