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2b8" officeooo:paragraph-rsid="001752b8"/>
    </style:style>
    <style:style style:name="P2" style:family="paragraph" style:parent-style-name="Standard">
      <style:text-properties fo:font-size="14pt" officeooo:rsid="001752b8" officeooo:paragraph-rsid="001752b8" style:font-size-asian="14pt" style:font-size-complex="14pt"/>
    </style:style>
    <style:style style:name="P3" style:family="paragraph" style:parent-style-name="Standard">
      <style:text-properties fo:font-size="12pt" officeooo:rsid="001df4e0" officeooo:paragraph-rsid="001df4e0" style:font-size-asian="10.5pt" style:font-size-complex="12pt"/>
    </style:style>
    <style:style style:name="T1" style:family="text">
      <style:text-properties officeooo:rsid="00181d2c"/>
    </style:style>
    <style:style style:name="T2" style:family="text">
      <style:text-properties officeooo:rsid="00191e3f"/>
    </style:style>
    <style:style style:name="T3" style:family="text">
      <style:text-properties officeooo:rsid="001ad977"/>
    </style:style>
    <style:style style:name="T4" style:family="text">
      <style:text-properties officeooo:rsid="001c5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ieren 1 – Klausurvorbereitung 17.12.2025</text:p>
      <text:p text:style-name="P3">Klausur: Exer 2/252, bei technischen Problemen am 19.01.2026 im selben Raum</text:p>
      <text:p text:style-name="P1">- <text:span text:style-name="T1">Stoff: alles was drankam -_-</text:span></text:p>
      <text:p text:style-name="P1"><text:tab/><text:span text:style-name="T1">algorithmisches Denken, Syntax/Semantik, Methoden schreiben, JavaDoc (Quiz), Klassen, <text:tab/>UML Modellierung (Objektdiagramm usw), Vererbung (oberflächlicher), </text:span><text:span text:style-name="T2">Node Konzept</text:span></text:p>
      <text:p text:style-name="P1">- <text:span text:style-name="T1">noch nicht sicher ob Theorie- und Praxisteil oder zusammen </text:span><text:span text:style-name="T2">(1/3 Theorie, 2/3 Praxis)</text:span></text:p>
      <text:p text:style-name="P1">- <text:span text:style-name="T2">Fehler im Code finden und korrigieren </text:span><text:span text:style-name="T3">(bspw mit einem Array o.ä.)</text:span></text:p>
      <text:p text:style-name="P1">- <text:span text:style-name="T3">eine </text:span><text:span text:style-name="T2">Aufgabe ähnlich vom Aufwand wie “Koordinatensystem” </text:span></text:p>
      <text:p text:style-name="P1">- <text:span text:style-name="T3">Schleifen lesen wie im Testat</text:span></text:p>
      <text:p text:style-name="P1">- <text:span text:style-name="T3">Klassendiagramm in Java Code übersetzen (NUR Sachen, die man im Diagramm sehen kann, z.B. keine getter und setter wenn diese nicht im Diagramm zu sehen sind → gibt sonst Punktabzug)</text:span></text:p>
      <text:p text:style-name="P1">!!! <text:span text:style-name="T4">aufpassen ob Methode oder Variable, wenn nur eine Sache da steht</text:span></text:p>
      <text:p text:style-name="P1">→ <text:span text:style-name="T4">wenn man crazy ist und erkennt, dass bspw ein Konstruktor da sein muss, kann es Bonuspunkte <text:s text:c="5"/>geben</text:span></text:p>
      <text:p text:style-name="P1">→ <text:span text:style-name="T4">wenn Methoden ohne genaue Funktion angegeben ist, erstmal nur return null oder 0, damit code kompilier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42:36.224886473</meta:creation-date>
    <dc:date>2025-12-17T14:22:40.689695434</dc:date>
    <meta:editing-duration>PT3M7S</meta:editing-duration>
    <meta:editing-cycles>2</meta:editing-cycles>
    <meta:generator>LibreOffice/24.2.7.2$Linux_X86_64 LibreOffice_project/420$Build-2</meta:generator>
    <meta:print-date>2025-12-17T14:22:39.479473824</meta:print-date>
    <meta:printed-by>PDF files</meta:printed-by>
    <meta:document-statistic meta:table-count="0" meta:image-count="0" meta:object-count="0" meta:page-count="1" meta:paragraph-count="12" meta:word-count="155" meta:character-count="1025" meta:non-whitespace-character-count="872"/>
  </office:meta>
</office:document-meta>
</file>