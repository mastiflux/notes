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76c8" officeooo:paragraph-rsid="001576c8"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1576c8" officeooo:paragraph-rsid="001576c8"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 genrerierter Aufsatz “Was ist Informatik”</text:p>
      <text:p text:style-name="P1">GenAI:<text:span text:style-name="T2"> chatgpt.com </text:span></text:p>
      <text:p text:style-name="P1">Prompt:<text:span text:style-name="T2"> schreibe einen Aufsatz zum Thema: Was ist Informatik? Mit mindestens 1000 Zeichen</text:span></text:p>
      <text:p text:style-name="P1">Ergebnis:</text:p>
      <text:p text:style-name="P2"><text:span text:style-name="Strong_20_Emphasis"><text:span text:style-name="T2"/></text:span></text:p>
      <text:p text:style-name="P2"><text:span text:style-name="Strong_20_Emphasis"><text:span text:style-name="T1">Was ist Informatik?</text:span></text:span></text:p>
      <text:p text:style-name="Text_20_body">Informatik ist die Wissenschaft von der systematischen Verarbeitung, Speicherung und Übertragung von Informationen. Sie beschäftigt sich damit, wie Daten dargestellt, organisiert und mithilfe von Computern verarbeitet werden können. Der Begriff setzt sich aus „Information“ und „Automatik“ zusammen und beschreibt damit das Ziel der Disziplin: Informationen automatisch und zuverlässig zu verarbeiten.</text:p>
      <text:p text:style-name="Text_20_body">Ein zentrales Element der Informatik ist der <text:span text:style-name="Strong_20_Emphasis">Algorithmus</text:span> – eine genaue Handlungsanweisung, mit der ein bestimmtes Problem Schritt für Schritt gelöst wird. Solche Algorithmen werden in <text:span text:style-name="Strong_20_Emphasis">Programmiersprachen</text:span> umgesetzt, damit Computer sie ausführen können. Bekannte Sprachen sind zum Beispiel Python, Java oder C++. Sie ermöglichen es, Software, Apps oder Websites zu entwickeln, die wir täglich nutzen.</text:p>
      <text:p text:style-name="Text_20_body">Die Informatik lässt sich in verschiedene Teilbereiche unterteilen. Die <text:span text:style-name="Strong_20_Emphasis">theoretische Informatik</text:span> untersucht die mathematischen Grundlagen, die <text:span text:style-name="Strong_20_Emphasis">praktische Informatik</text:span> entwickelt Programme und Software, und die <text:span text:style-name="Strong_20_Emphasis">technische Informatik</text:span> befasst sich mit der Hardware, also den Geräten selbst. Die <text:span text:style-name="Strong_20_Emphasis">angewandte Informatik</text:span> verbindet diese Kenntnisse mit anderen Fachgebieten – etwa in der Medizin, Wirtschaft oder Biologie.</text:p>
      <text:p text:style-name="Text_20_body">In unserem Alltag ist Informatik allgegenwärtig: in Smartphones, Computern, Autos, sozialen Netzwerken oder beim Online-Banking. Sie erleichtert viele Aufgaben, schafft aber auch neue Herausforderungen, zum Beispiel beim Datenschutz oder bei der Cybersicherheit.</text:p>
      <text:p text:style-name="Text_20_body">Zusammenfassend ist Informatik also weit mehr als nur das Programmieren. Sie ist eine Schlüsselwissenschaft, die unsere moderne Welt prägt, Probleme löst und Innovationen möglich macht. Ohne Informatik wäre das heutige Leben kaum vorstellbar.</text:p>
      <text:p text:style-name="Text_20_body"><text:span text:style-name="Emphasis">(Zeichenanzahl: ca. 1.080)</text:span></text:p>
      <text:p text:style-name="P1"><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3:04:27.787281164</meta:creation-date>
    <dc:date>2025-10-27T13:07:55.765621147</dc:date>
    <meta:editing-duration>PT3M29S</meta:editing-duration>
    <meta:editing-cycles>1</meta:editing-cycles>
    <meta:document-statistic meta:table-count="0" meta:image-count="0" meta:object-count="0" meta:page-count="1" meta:paragraph-count="11" meta:word-count="248" meta:character-count="1920" meta:non-whitespace-character-count="1680"/>
    <meta:generator>LibreOffice/24.2.7.2$Linux_X86_64 LibreOffice_project/420$Build-2</meta:generator>
  </office:meta>
</office:document-meta>
</file>