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009ba"/>
    </style:style>
    <style:style style:name="P2" style:family="paragraph" style:parent-style-name="Text_20_body">
      <style:text-properties fo:font-size="15pt" fo:font-weight="bold" officeooo:paragraph-rsid="001009ba" style:font-size-asian="15pt" style:font-weight-asian="bold" style:font-size-complex="15pt" style:font-weight-complex="bold"/>
    </style:style>
    <style:style style:name="P3" style:family="paragraph" style:parent-style-name="Text_20_body">
      <style:text-properties officeooo:paragraph-rsid="0011088c"/>
    </style:style>
    <style:style style:name="T1" style:family="text">
      <style:text-properties fo:font-size="16pt" officeooo:rsid="001009ba" style:font-size-asian="16pt" style:font-size-complex="16pt"/>
    </style:style>
    <style:style style:name="T2" style:family="text">
      <style:text-properties style:font-name="Liberation Sans"/>
    </style:style>
    <style:style style:name="T3" style:family="text">
      <style:text-properties style:font-name="Liberation Sans" fo:font-weight="normal" officeooo:rsid="001009ba" style:font-weight-asian="normal" style:font-weight-complex="normal"/>
    </style:style>
    <style:style style:name="T4" style:family="text">
      <style:text-properties style:font-name="Liberation Sans" fo:font-weight="normal" officeooo:rsid="0011088c" style:font-weight-asian="normal" style:font-weight-complex="normal"/>
    </style:style>
    <style:style style:name="T5" style:family="text">
      <style:text-properties style:font-name="Liberation Sans" officeooo:rsid="001009ba"/>
    </style:style>
    <style:style style:name="T6" style:family="text">
      <style:text-properties style:font-name="Liberation Sans" officeooo:rsid="001108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2">Felix Häse</text:span></text:span></text:p>
      <text:p text:style-name="P2"><text:span text:style-name="T2">E³ - Erfahrung - Erkenntnis - Entwicklung 2</text:span></text:p>
      <text:p text:style-name="Text_20_body"><text:span text:style-name="Strong_20_Emphasis"><text:span text:style-name="T2">Welche Vorstellungen vom Studium, die du vorab hattest, zeigen sich auch in der Realität? Welche Erfahrungen und Erlebnisse haben dich in deiner St</text:span></text:span><text:span text:style-name="Strong_20_Emphasis"><text:span text:style-name="T2">udienwahl bestätigt?</text:span></text:span></text:p>
      <text:p text:style-name="P1"><text:span text:style-name="Strong_20_Emphasis"><text:span text:style-name="T3">Vor allem gemerkt habe ich, dass das Studium vom Lernaufwand, erwarteterweise, ein ganz anderes Level ist, als Schule damals. In der Schule musste ich so gut wie nie lernen, das fällt mir jetzt natürlich teilweise auf die Füße, da ich erstmal lernen muss, gut zu lernen. Allerdings bereue ich die Wahl des Studiengangs nicht, bisher interessiert mich der Stoff größtenteils sehr und es macht Spaß, beim Programmieren logische Zusammenhänge ausdrücken zu können.</text:span></text:span></text:p>
      <text:p text:style-name="P1"><text:span text:style-name="Strong_20_Emphasis"><text:span text:style-name="T5">Welche Lernstrategien hast du wie gewohnt angewendet? Welche sind hinzugekommen? Welche wünschst du dir?</text:span></text:span></text:p>
      <text:p text:style-name="P3"><text:span text:style-name="Strong_20_Emphasis"><text:span text:style-name="T3">Zuvor hatte ich eigentlich gar keine richtige Lernstrategie, nur bei Fächern wie Mathe eben das wiederholte Üben von Beispielaufgaben. Ich habe allerdings eine Strategie gefunden, welche ziemlich gut für mich funktioniert bisher, nämlich “Learn-Do-Teach”, bei welcher man sich erst den zu lernenden Stoff bspw. durch ein YouTube Video aneignet und unmittelbar danach versucht diese Theorien umzusetzen in Beispielaufgaben. Zudem erklärt man sich die Themen dabei oder danch selbst so, als würde man einem Fremden erklären wollen, was man in der Aufgabe gemacht hat und wie das funktioniert. Es wird sich herausstellen wie gut diese Strategie über die nächsten Semester </text:span></text:span><text:span text:style-name="Strong_20_Emphasis"><text:span text:style-name="T4">klappt, aber soweit gefällt mir diese am Besten.</text:span></text:span></text:p>
      <text:p text:style-name="P3"><text:span text:style-name="Strong_20_Emphasis"><text:span text:style-name="T5">Wenn der Tag 26 Stunden hätte, womit würdest du die beiden zusätzlichen Stunden verbringen? Welche Veränderungsmöglichkeiten für deinen Alltag lassen sich daraus ableiten?</text:span></text:span></text:p>
      <text:p text:style-name="P3"><text:span text:style-name="Strong_20_Emphasis"><text:span text:style-name="T4">Hätte der Tag 26 Stunden, würde ich diese extra Stunden wahrscheinlich zur Hälfte mit Lernen und zur anderen Hälfte mit Schlafen verbringen. Eigentlich ist die Zeit, die ich zum lernen aufwende sehr überschaubar, aber für mich aktuell noch vollkommen ausreichend, mein größeres Problem ist eher der Schlafmangel, da ich sehr schwierig zur Ruhe komme Abends und meist auch ziemlich spät erst Zuhause bin (wegen Sport, Fahrtwegen u.ä.).</text:span></text:span></text:p>
      <text:p text:style-name="P3"><text:span text:style-name="Strong_20_Emphasis"><text:span text:style-name="T4"><text:s/></text:span></text:span><text:span text:style-name="Strong_20_Emphasis"><text:span text:style-name="T6">Welcher Aspekt am Berufsbild Informatik fasziniert dich am meisten?</text:span></text:span></text:p>
      <text:p text:style-name="P3"><text:span text:style-name="Strong_20_Emphasis"><text:span text:style-name="T4">Mich fasziniert am Meisten, dass man trotz handwerklicher Ungeschicktheit in der Lage ist, Dinge zu erschaffen (Programme usw.), die tatsächlich nützlich sind für die Bevölkerung und den Alltag vereinfachen kann. Außerdem kann man gut im Team arbeiten (wie ich im Projekt gemerkt habe) und trotzdem größtenteils alleine arbeiten kann, was ich persönlich bevorzuge.</text:span></text:span></text:p>
      <text:p text:style-name="P1"><text:span text:style-name="Strong_20_Emphasis"><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5T10:03:55.418306797</meta:creation-date>
    <dc:date>2025-12-15T10:26:08.165150410</dc:date>
    <meta:editing-duration>PT10M</meta:editing-duration>
    <meta:editing-cycles>1</meta:editing-cycles>
    <meta:document-statistic meta:table-count="0" meta:image-count="0" meta:object-count="0" meta:page-count="1" meta:paragraph-count="10" meta:word-count="380" meta:character-count="2539" meta:non-whitespace-character-count="2169"/>
    <meta:generator>LibreOffice/24.2.7.2$Linux_X86_64 LibreOffice_project/420$Build-2</meta:generator>
  </office:meta>
</office:document-meta>
</file>