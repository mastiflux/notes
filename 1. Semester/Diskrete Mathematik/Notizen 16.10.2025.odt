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eca" officeooo:paragraph-rsid="0007eeca"/>
    </style:style>
    <style:style style:name="P2" style:family="paragraph" style:parent-style-name="Standard">
      <style:text-properties style:text-underline-style="solid" style:text-underline-width="auto" style:text-underline-color="font-color" officeooo:rsid="0007eeca" officeooo:paragraph-rsid="0007eeca"/>
    </style:style>
    <style:style style:name="P3" style:family="paragraph" style:parent-style-name="Standard">
      <style:text-properties fo:font-size="16pt" fo:font-style="italic" officeooo:rsid="0007eeca" officeooo:paragraph-rsid="0007eeca" style:font-size-asian="16pt" style:font-style-asian="italic" style:font-size-complex="1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8dfb"/>
    </style:style>
    <style:style style:name="T3" style:family="text">
      <style:text-properties style:font-name="Liberation Serif" officeooo:rsid="000a8dfb"/>
    </style:style>
    <style:style style:name="T4" style:family="text">
      <style:text-properties officeooo:rsid="000c6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.10.25</text:p>
      <text:p text:style-name="P1"/>
      <text:p text:style-name="P3">Vergleich logisches Und <text:span text:style-name="T2">(</text:span><text:span text:style-name="T3">˄</text:span><text:span text:style-name="T2">)</text:span> / <text:s/><text:span text:style-name="T2">Grammatisches </text:span>Und</text:p>
      <text:p text:style-name="P1"/>
      <text:p text:style-name="P2">LOGIK:</text:p>
      <text:p text:style-name="P1"/>
      <text:p text:style-name="P1">- Verknüpfen, bzw aufzählen von Aussagen (NUR von Aussagen)</text:p>
      <text:p text:style-name="P1"/>
      <text:p text:style-name="P2">GRAMMATIK:</text:p>
      <text:p text:style-name="P1"/>
      <text:p text:style-name="P1">- Aufzählen von Objekten, z.B. Nomen, Verben, Adjektiven und Sätzen</text:p>
      <text:p text:style-name="P1">- Beispiel: Im Supermarkt kann man Äpfel <text:span text:style-name="T1">und</text:span> Birnen kaufen. ← logisches ODER</text:p>
      <text:p text:style-name="P1"/>
      <text:p text:style-name="P1">=&gt; Abstraktionsprozess von Grammatik zu Logik</text:p>
      <text:p text:style-name="P1"/>
      <text:p text:style-name="P1">“aber” im Alltag nur ein logisches UND (“und wider erwarten”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08:29:37.152605924</meta:creation-date>
    <dc:date>2025-10-16T11:15:52.327662640</dc:date>
    <meta:editing-duration>PT1H29M1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58" meta:character-count="380" meta:non-whitespace-character-count="330"/>
  </office:meta>
</office:document-meta>
</file>