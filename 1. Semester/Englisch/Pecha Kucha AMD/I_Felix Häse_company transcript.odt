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d48" officeooo:paragraph-rsid="0005ed48"/>
    </style:style>
    <style:style style:name="P2" style:family="paragraph" style:parent-style-name="Standard">
      <style:text-properties officeooo:rsid="00093f72" officeooo:paragraph-rsid="00093f72"/>
    </style:style>
    <style:style style:name="P3" style:family="paragraph" style:parent-style-name="Standard">
      <style:text-properties officeooo:rsid="000b36a1" officeooo:paragraph-rsid="000b36a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36a1" officeooo:paragraph-rsid="000b36a1" style:font-weight-asian="bold" style:font-weight-complex="bold"/>
    </style:style>
    <style:style style:name="P5" style:family="paragraph" style:parent-style-name="Standard">
      <style:text-properties officeooo:paragraph-rsid="000b36a1"/>
    </style:style>
    <style:style style:name="P6" style:family="paragraph" style:parent-style-name="Standard">
      <style:text-properties officeooo:paragraph-rsid="000b845a"/>
    </style:style>
    <style:style style:name="P7" style:family="paragraph" style:parent-style-name="Standard">
      <style:text-properties officeooo:rsid="000dbec9" officeooo:paragraph-rsid="000dbec9"/>
    </style:style>
    <style:style style:name="P8" style:family="paragraph" style:parent-style-name="Standard">
      <style:text-properties fo:font-style="italic" officeooo:rsid="000f3a45" officeooo:paragraph-rsid="000f3a45" style:font-style-asian="italic" style:font-style-complex="italic"/>
    </style:style>
    <style:style style:name="T1" style:family="text">
      <style:text-properties officeooo:rsid="0006fd2a"/>
    </style:style>
    <style:style style:name="T2" style:family="text">
      <style:text-properties officeooo:rsid="000816bf"/>
    </style:style>
    <style:style style:name="T3" style:family="text">
      <style:text-properties officeooo:rsid="0008cd89"/>
    </style:style>
    <style:style style:name="T4" style:family="text">
      <style:text-properties officeooo:rsid="00093f72"/>
    </style:style>
    <style:style style:name="T5" style:family="text">
      <style:text-properties officeooo:rsid="0009d086"/>
    </style:style>
    <style:style style:name="T6" style:family="text">
      <style:text-properties style:text-underline-style="none" fo:font-weight="normal" officeooo:rsid="000b36a1" style:font-weight-asian="normal" style:font-weight-complex="normal"/>
    </style:style>
    <style:style style:name="T7" style:family="text">
      <style:text-properties officeooo:rsid="000b845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845a" style:font-style-asian="italic" style:font-style-complex="italic"/>
    </style:style>
    <style:style style:name="T10" style:family="text">
      <style:text-properties fo:font-style="italic" style:text-underline-style="none" fo:font-weight="normal" officeooo:rsid="000b36a1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02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CRIPT AMD Felix Häse</text:p>
      <text:p text:style-name="P1"/>
      <text:p text:style-name="P1">- Introduction</text:p>
      <text:p text:style-name="P1"><text:tab/>- own experiences</text:p>
      <text:p text:style-name="P1"><text:tab/>- process of building a pc</text:p>
      <text:p text:style-name="P1">- General information about the company</text:p>
      <text:p text:style-name="P1"><text:tab/>- secondary sector (manufacturing)</text:p>
      <text:p text:style-name="P1"><text:tab/>- designs <text:span text:style-name="T1">CPUs, GPUs, accelerators, adaptive SoCs</text:span></text:p>
      <text:p text:style-name="P1"><text:tab/>- <text:span text:style-name="T1">products are used in several sectors e.g. personal computing, HPC, AI infrastructure</text:span></text:p>
      <text:p text:style-name="P1"><text:tab/>- <text:span text:style-name="T1">business model: designing chips + software stacks, system-level architecure, partnering <text:tab/> <text:s/>with cloud providers + research institutions </text:span><text:span text:style-name="T12">e.g. TSMC</text:span></text:p>
      <text:p text:style-name="P1">- <text:span text:style-name="T1">History</text:span></text:p>
      <text:p text:style-name="P1"><text:tab/>- <text:span text:style-name="T2">founded in 1969 by Walter Jeremiah Sanders and seven collegues at Fairchild</text:span></text:p>
      <text:p text:style-name="P1"><text:tab/>- <text:span text:style-name="T2">1982 → supplying second source chips for Intel (ended 1986)</text:span></text:p>
      <text:p text:style-name="P1"><text:tab/>- <text:span text:style-name="T3">1991 → released microprocessor compatible with Intels next generation chips (led to legal <text:tab/> <text:s/>dispute, which AMD won)</text:span></text:p>
      <text:p text:style-name="P1"><text:tab/>- <text:span text:style-name="T3">early 2000s → release of the first Athlon chip (first chip beeing able to reach a 1 Ghz clock <text:tab/> <text:s/>speed )</text:span></text:p>
      <text:p text:style-name="P1"><text:tab/>- <text:span text:style-name="T3">2011 → major contracts with Sony (PS4) and Microsoft (Xbox One) to produce chips for <text:tab/> <text:s/>gaming consoles</text:span></text:p>
      <text:p text:style-name="P1"><text:tab/>- <text:span text:style-name="T3">2025 → contract with OpenAI to supply chips for expanding data center for ChatGPT</text:span></text:p>
      <text:p text:style-name="P1">- <text:span text:style-name="T4">Organisation model</text:span></text:p>
      <text:p text:style-name="P1"><text:tab/>- <text:span text:style-name="T4">organized around product lines/ operating segments</text:span></text:p>
      <text:p text:style-name="P1"><text:tab/>- <text:span text:style-name="T4">Data Center/ Server (e.g. Threadripper CPUs)</text:span></text:p>
      <text:p text:style-name="P1"><text:tab/>- <text:span text:style-name="T4">Client/ Consumer (e.g. notebooks, Ryzen processors)</text:span></text:p>
      <text:p text:style-name="P1"><text:tab/>- <text:span text:style-name="T4">Gaming/ Graphics (e.g. GPUs, gaming consoles)</text:span></text:p>
      <text:p text:style-name="P1"><text:tab/>- <text:span text:style-name="T4">Research and Development (e.g. microarchitecure, energy efficiency)</text:span></text:p>
      <text:p text:style-name="P1">- <text:span text:style-name="T4">Current major projects</text:span></text:p>
      <text:p text:style-name="P1"><text:tab/>- <text:span text:style-name="T4">instinct MI350 series accelerators: new gen GPUs aimed at generative AI &amp; HPC <text:tab/> <text:s/><text:tab/> <text:s/>workloads</text:span></text:p>
      <text:p text:style-name="P1"><text:tab/>- <text:span text:style-name="T4">ROCm 7 software stack: improving developer expierence, expanding hardware <text:tab/> <text:s/><text:tab/> <text:s/>compatibility</text:span></text:p>
      <text:p text:style-name="P2"><text:tab/>- <text:span text:style-name="T5">AMD developer cloud: open-source community access to AMD’s compute environment</text:span></text:p>
      <text:p text:style-name="P1">- <text:span text:style-name="T5">Future goals</text:span></text:p>
      <text:p text:style-name="P1"><text:tab/>- <text:span text:style-name="T5">Leadership in AI and Data Center (beat current competition Nvidia and Intel)</text:span></text:p>
      <text:p text:style-name="P1"><text:tab/>- <text:span text:style-name="T5">open ecosystem (open rack designs and software stacks)</text:span></text:p>
      <text:p text:style-name="P1"><text:tab/>- <text:span text:style-name="T5">Efficiency leadership (not just raw performance, but performance per Watt)</text:span></text:p>
      <text:p text:style-name="P1"><text:tab/>→ <text:span text:style-name="T5">reduce power usage of AI/HPC systems</text:span></text:p>
      <text:p text:style-name="P1"><text:tab/>- <text:span text:style-name="T5">expand markets</text:span></text:p>
      <text:p text:style-name="P1"><text:tab/>- <text:span text:style-name="T5">improve sustainibility</text:span></text:p>
      <text:p text:style-name="P1"/>
      <text:p text:style-name="P4">Keywords:</text:p>
      <text:p text:style-name="P5"><text:span text:style-name="T10">SoC: </text:span><text:span text:style-name="T6">an integrated circuit that combines </text:span>the essential components of a computer or electronic system onto a single microchip</text:p>
      <text:p text:style-name="P3"><text:span text:style-name="T8">HPC:</text:span> high performance computing → using powerful and interconnected computers to solve complex problems</text:p>
      <text:p text:style-name="P6"><text:span text:style-name="T9">TSMC:</text:span><text:span text:style-name="T7"> </text:span><text:bookmark text:name="_i-D0aI-NN9iqi-gPuZTMgAU_35"/>Taiwan Semiconductor Manufacturing Company → <text:span text:style-name="T7">worlds</text:span> <text:span text:style-name="T7">largest independent </text:span>semiconductor manufacturer</text:p>
      <text:p text:style-name="P7"><text:span text:style-name="T8">software stack:</text:span> a combination of software components, that work together to build and run an application </text:p>
      <text:p text:style-name="P8">Fairchild: <text:span text:style-name="T11">was an American semiconductor company, manufacturing and developoing semiconductors</text:span></text:p>
      <text:p text:style-name="P4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4:28:31.261234237</meta:creation-date>
    <dc:date>2025-10-20T19:29:34.949658029</dc:date>
    <meta:editing-duration>PT5H51M1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363" meta:character-count="2444" meta:non-whitespace-character-count="2069"/>
  </office:meta>
</office:document-meta>
</file>