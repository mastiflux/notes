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b35fb" officeooo:paragraph-rsid="001b35fb"/>
    </style:style>
    <style:style style:name="P2" style:family="paragraph" style:parent-style-name="Standard">
      <style:text-properties officeooo:paragraph-rsid="001b35fb"/>
    </style:style>
    <style:style style:name="T1" style:family="text">
      <style:text-properties officeooo:rsid="001b35fb"/>
    </style:style>
    <style:style style:name="T2" style:family="text">
      <style:text-properties fo:language="en" fo:country="US"/>
    </style:style>
    <style:style style:name="T3" style:family="text">
      <style:text-properties fo:language="en" fo:country="US" officeooo:rsid="001b35fb"/>
    </style:style>
    <style:style style:name="T4" style:family="text">
      <style:text-properties fo:language="en" fo:country="US" officeooo:rsid="001c11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art Home Devices</text:p>
      <text:p text:style-name="P1"/>
      <text:p text:style-name="P2"><text:span text:style-name="T1">A </text:span><text:bookmark text:name="tw-target-text"/><text:span text:style-name="T2">robot vacuum cleaner </text:span><text:span text:style-name="T3">is a device used for cleaning the floor by itself while nobody is home.</text:span></text:p>
      <text:p text:style-name="P1"><text:span text:style-name="T3">Y</text:span><text:span text:style-name="T2">ou can simply turn it on if you forgot to clean the house before leaving and you are getting visitors later that day, without enough time to clean everything manually, </text:span><text:span text:style-name="T4">which is a lot more comfortable than cleaning everything by yourself. </text:span></text:p>
      <text:p text:style-name="P2"><text:span text:style-name="T3"/></text:p>
      <text:p text:style-name="P1"><text:span text:style-name="T2">A sensor is a device used to measure the temperature in the house, so you can take action and turn up/down the heating. You could use this if you are about to get home and you don’t want to freeze in your own room after arriving. </text:span></text:p>
      <text:p text:style-name="P1"><text:span text:style-name="T2"/></text:p>
      <text:p text:style-name="P1"><text:span text:style-name="T2">An alarm system is a system used to inform you about any types of anomalies at your house while nobody is home, so you get notified e.g. if someone breaks in. This is especially useful, if you are on vacation, since it makes you feel a lot less worried. </text:span></text:p>
      <text:p text:style-name="P1"><text:span text:style-name="T2"/></text:p>
      <text:p text:style-name="P1"><text:span text:style-name="T2">A smart lightswitch is a device used to turn on or off the lights in your house remotely. You could use this if you are about to go to bed and you don’t want to get to the bed in the dark, so you can just lay in bed and turn off the lights afterwards. </text:span></text:p>
      <text:p text:style-name="P1"><text:span text:style-name="T2"/></text:p>
      <text:p text:style-name="P1"><text:span text:style-name="T2">A smart doorbell is a device used to communicate with visitors through the doorbell even though you are not home and observe what is going on in front of your door. If a package you ordered arrived you can tell the delivery person where to leave it if you are not home.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3:42:33.224788009</meta:creation-date>
    <dc:date>2025-11-25T13:59:10.434130448</dc:date>
    <meta:editing-duration>PT4M20S</meta:editing-duration>
    <meta:editing-cycles>1</meta:editing-cycles>
    <meta:document-statistic meta:table-count="0" meta:image-count="0" meta:object-count="0" meta:page-count="1" meta:paragraph-count="7" meta:word-count="264" meta:character-count="1357" meta:non-whitespace-character-count="1095"/>
    <meta:generator>LibreOffice/24.2.7.2$Linux_X86_64 LibreOffice_project/420$Build-2</meta:generator>
  </office:meta>
</office:document-meta>
</file>