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a8f" officeooo:paragraph-rsid="00052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tages:</text:p>
      <text:p text:style-name="P1">- dangerous content (unaccaptable risks) harder to access for children etc.</text:p>
      <text:p text:style-name="P1">- trancparency, watermarks</text:p>
      <text:p text:style-name="P1">- regulating but still encouraging innovation (startups)</text:p>
      <text:p text:style-name="P1">- AI systems need to be tested by human</text:p>
      <text:p text:style-name="P1"/>
      <text:p text:style-name="P1">Disadvantages:</text:p>
      <text:p text:style-name="P1">- watermarks easily removed</text:p>
      <text:p text:style-name="P1">- AI is easy to manipulate to do banned things→ harder to actually implement ir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4:48:38.969169477</meta:creation-date>
    <dc:date>2025-10-28T14:57:02.052034940</dc:date>
    <meta:editing-duration>PT8M24S</meta:editing-duration>
    <meta:editing-cycles>1</meta:editing-cycles>
    <meta:document-statistic meta:table-count="0" meta:image-count="0" meta:object-count="0" meta:page-count="1" meta:paragraph-count="8" meta:word-count="51" meta:character-count="328" meta:non-whitespace-character-count="285"/>
    <meta:generator>LibreOffice/24.2.7.2$Linux_X86_64 LibreOffice_project/420$Build-2</meta:generator>
  </office:meta>
</office:document-meta>
</file>